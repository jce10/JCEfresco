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&amp;D protons</text:p>
          </table:table-cell>
          <table:table-cell table:number-columns-repeated="5"/>
          <table:table-cell office:value-type="string" calcext:value-type="string">
            <text:p>K&amp;D neutrons</text:p>
          </table:table-cell>
          <table:table-cell table:number-columns-repeated="5"/>
          <table:table-cell office:value-type="string" calcext:value-type="string">
            <text:p>Zhang-Pang-Lou deuterons on p-shell targets</text:p>
          </table:table-cell>
          <table:table-cell table:number-columns-repeated="5"/>
          <table:table-cell office:value-type="string" calcext:value-type="string">
            <text:p>Haixia &amp; Chonghai (2006) – deuterons on 12C—238U, E below 183 MeV</text:p>
          </table:table-cell>
          <table:table-cell table:number-columns-repeated="5"/>
          <table:table-cell office:value-type="string" calcext:value-type="string">
            <text:p>Pang et al. (2015) – A=3 proj on 1p-shell nuclei, 3—100 MeV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Z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-Epf</text:p>
          </table:table-cell>
          <table:table-cell table:formula="of:=[.C5]-[.F20]" office:value-type="float" office:value="36.24214" calcext:value-type="float">
            <text:p>36.24214</text:p>
          </table:table-cell>
          <table:table-cell/>
          <table:table-cell office:value-type="string" calcext:value-type="string">
            <text:p>Z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-Enf</text:p>
          </table:table-cell>
          <table:table-cell table:formula="of:=[.I5]-[.L20]" office:value-type="float" office:value="12.68742" calcext:value-type="float">
            <text:p>12.68742</text:p>
          </table:table-cell>
          <table:table-cell/>
          <table:table-cell office:value-type="string" calcext:value-type="string">
            <text:p>Z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-EC</text:p>
          </table:table-cell>
          <table:table-cell table:formula="of:=[.O5]-[.R24]" office:value-type="float" office:value="8.54283667773612" calcext:value-type="float">
            <text:p>8.54283667773612</text:p>
          </table:table-cell>
          <table:table-cell/>
          <table:table-cell office:value-type="string" calcext:value-type="string">
            <text:p>ZT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Z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^2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eV*fm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N-Z)/A</text:p>
          </table:table-cell>
          <table:table-cell table:formula="of:=([.C4]-[.C2])/[.C3]" office:value-type="float" office:value="0" calcext:value-type="float">
            <text:p>0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(N-Z)/A</text:p>
          </table:table-cell>
          <table:table-cell table:formula="of:=([.I4]-[.I2])/[.I3]" office:value-type="float" office:value="-0.0769230769230769" calcext:value-type="float">
            <text:p>-0.076923076923077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(N-Z)/A</text:p>
          </table:table-cell>
          <table:table-cell table:formula="of:=([.O4]-[.O2])/[.O3]" office:value-type="float" office:value="-0.0769230769230769" calcext:value-type="float">
            <text:p>-0.076923076923077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^(1/3)</text:p>
          </table:table-cell>
          <table:table-cell table:formula="of:=[.U3]^(1/3)" office:value-type="float" office:value="2.92401773821287" calcext:value-type="float">
            <text:p>2.92401773821287</text:p>
          </table:table-cell>
          <table:table-cell table:number-columns-repeated="2"/>
          <table:table-cell office:value-type="string" calcext:value-type="string">
            <text:p>Z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s</text:p>
          </table:table-cell>
          <table:table-cell table:formula="of:=([.AA5]-[.AA3])/[.AA4]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formula="of:=[.C3]-[.C2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T</text:p>
          </table:table-cell>
          <table:table-cell table:formula="of:=[.I3]-[.I2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T</text:p>
          </table:table-cell>
          <table:table-cell table:formula="of:=[.O3]-[.O2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T</text:p>
          </table:table-cell>
          <table:table-cell table:formula="of:=[.U3]-[.U2]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^(1/3)</text:p>
          </table:table-cell>
          <table:table-cell table:formula="of:=[.AA4]^(1/3)" office:value-type="float" office:value="2.28942848510666" calcext:value-type="float">
            <text:p>2.2894284851066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Ebe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b MeV</text:p>
          </table:table-cell>
          <table:table-cell table:number-columns-repeated="3"/>
          <table:table-cell office:value-type="string" calcext:value-type="string">
            <text:p>Ebeam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lab MeV</text:p>
          </table:table-cell>
          <table:table-cell table:number-columns-repeated="3"/>
          <table:table-cell office:value-type="string" calcext:value-type="string">
            <text:p>Ebeam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b MeV</text:p>
          </table:table-cell>
          <table:table-cell table:number-columns-repeated="3"/>
          <table:table-cell office:value-type="string" calcext:value-type="string">
            <text:p>Ebe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b MeV</text:p>
          </table:table-cell>
          <table:table-cell table:number-columns-repeated="3"/>
          <table:table-cell office:value-type="string" calcext:value-type="string">
            <text:p>NT</text:p>
          </table:table-cell>
          <table:table-cell table:formula="of:=[.AA4]-[.AA3]" office:value-type="float" office:value="6" calcext:value-type="float">
            <text:p>6</text:p>
          </table:table-cell>
          <table:table-cell office:value-type="string" calcext:value-type="string">
            <text:p>pm</text:p>
          </table:table-cell>
          <table:table-cell table:formula="of:=IF([.AA2]=2;1;-1)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5"/>
          <table:table-cell office:value-type="string" calcext:value-type="string">
            <text:p>Ebe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b MeV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Vv</text:p>
          </table:table-cell>
          <table:table-cell table:formula="of:=[.F7]*(1-[.F8]*[.F2]+[.F9]*[.F2]^(2)-[.F10]*[.F2]^(3)) + [.F21]*[.F7]*([.F8]-2*[.F9]*[.F2]+3*[.F10]*[.F2]^(2))" office:value-type="float" office:value="46.1437465581935" calcext:value-type="float">
            <text:p>46.1437465581935</text:p>
          </table:table-cell>
          <table:table-cell/>
          <table:table-cell office:value-type="string" calcext:value-type="string">
            <text:p>v1p</text:p>
          </table:table-cell>
          <table:table-cell table:formula="of:=59.3+21*[.F3]-0.024*[.C3]" office:value-type="float" office:value="59.012" calcext:value-type="float">
            <text:p>59.012</text:p>
          </table:table-cell>
          <table:table-cell/>
          <table:table-cell office:value-type="string" calcext:value-type="string">
            <text:p>Vv</text:p>
          </table:table-cell>
          <table:table-cell table:formula="of:=[.L7]*(1-[.L8]*[.L2]+[.L9]*[.L2]^(2)-[.L10]*[.L2]^(3))" office:value-type="float" office:value="55.2516839550119" calcext:value-type="float">
            <text:p>55.2516839550119</text:p>
          </table:table-cell>
          <table:table-cell/>
          <table:table-cell office:value-type="string" calcext:value-type="string">
            <text:p>v1n</text:p>
          </table:table-cell>
          <table:table-cell table:formula="of:=59.3-21*[.L3]-0.024*[.I3]" office:value-type="float" office:value="60.6033846153846" calcext:value-type="float">
            <text:p>60.6033846153846</text:p>
          </table:table-cell>
          <table:table-cell/>
          <table:table-cell office:value-type="string" calcext:value-type="string">
            <text:p>V</text:p>
          </table:table-cell>
          <table:table-cell table:formula="of:=[.R7]+[.R8]*[.R2]" office:value-type="float" office:value="96.5165485669116" calcext:value-type="float">
            <text:p>96.5165485669116</text:p>
          </table:table-cell>
          <table:table-cell/>
          <table:table-cell office:value-type="string" calcext:value-type="string">
            <text:p>Vr</text:p>
          </table:table-cell>
          <table:table-cell office:value-type="float" office:value="98.9" calcext:value-type="float">
            <text:p>98.9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formula="of:=91.85-0.249*[.U5]+0.000116*[.U5]*[.U5]+0.642*[.U2]/([.U3])^(1/3)" office:value-type="float" office:value="90.5304269386395" calcext:value-type="float">
            <text:p>90.5304269386395</text:p>
          </table:table-cell>
          <table:table-cell table:number-columns-repeated="3"/>
          <table:table-cell office:value-type="string" calcext:value-type="string">
            <text:p>EC</text:p>
          </table:table-cell>
          <table:table-cell table:formula="of:=6*[.AA2]*[.AA3]*[.AC2]/(5*[.AA16]*[.AC4])" office:value-type="float" office:value="6.96714019875842" calcext:value-type="float">
            <text:p>6.96714019875842</text:p>
          </table:table-cell>
          <table:table-cell office:value-type="string" calcext:value-type="string">
            <text:p>MeV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table:formula="of:=[.F11]*[.F2]^(2)/([.F2]^(2)+[.F12]^(2))" office:value-type="float" office:value="2.82864378194997" calcext:value-type="float">
            <text:p>2.82864378194997</text:p>
          </table:table-cell>
          <table:table-cell/>
          <table:table-cell office:value-type="string" calcext:value-type="string">
            <text:p>v2p</text:p>
          </table:table-cell>
          <table:table-cell table:formula="of:=0.007067+0.00000423*[.C3]" office:value-type="float" office:value="0.00711776" calcext:value-type="float">
            <text:p>0.00711776</text:p>
          </table:table-cell>
          <table:table-cell/>
          <table:table-cell office:value-type="string" calcext:value-type="string">
            <text:p>Wv</text:p>
          </table:table-cell>
          <table:table-cell table:formula="of:=[.L11]*[.L2]^(2)/([.L2]^(2)+[.L12]^(2))" office:value-type="float" office:value="0.349073902731106" calcext:value-type="float">
            <text:p>0.349073902731106</text:p>
          </table:table-cell>
          <table:table-cell/>
          <table:table-cell office:value-type="string" calcext:value-type="string">
            <text:p>v2n</text:p>
          </table:table-cell>
          <table:table-cell table:formula="of:=0.007228-0.00000148*[.I3]" office:value-type="float" office:value="0.00720876" calcext:value-type="float">
            <text:p>0.00720876</text:p>
          </table:table-cell>
          <table:table-cell/>
          <table:table-cell office:value-type="string" calcext:value-type="string">
            <text:p>r0</text:p>
          </table:table-cell>
          <table:table-cell table:formula="of:=([.R9]*[.O3]^(1/3)+[.R10]+[.R11]*[.R2])/[.O3]^(1/3)" office:value-type="float" office:value="1.04322733598625" calcext:value-type="float">
            <text:p>1.04322733598625</text:p>
          </table:table-cell>
          <table:table-cell/>
          <table:table-cell office:value-type="string" calcext:value-type="string">
            <text:p>Ve</text:p>
          </table:table-cell>
          <table:table-cell office:value-type="float" office:value="-0.279" calcext:value-type="float">
            <text:p>-0.279</text:p>
          </table:table-cell>
          <table:table-cell table:number-columns-repeated="2"/>
          <table:table-cell office:value-type="string" calcext:value-type="string">
            <text:p>rr</text:p>
          </table:table-cell>
          <table:table-cell table:formula="of:=1.152-0.00776/[.W3]" office:value-type="float" office:value="1.14934611733076" calcext:value-type="float">
            <text:p>1.14934611733076</text:p>
          </table:table-cell>
          <table:table-cell table:number-columns-repeated="3"/>
          <table:table-cell office:value-type="string" calcext:value-type="string">
            <text:p>targ: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6,7Li</text:p>
          </table:table-cell>
          <table:table-cell table:number-columns-repeated="2"/>
          <table:table-cell office:value-type="string" calcext:value-type="string">
            <text:p>1p</text:p>
          </table:table-cell>
          <table:table-cell office:value-type="string" calcext:value-type="string">
            <text:p>Li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V</text:p>
          </table:table-cell>
          <table:table-cell table:formula="of:=1.3039-0.4054*[.C3]^(-1/3)" office:value-type="float" office:value="1.12682523979795" calcext:value-type="float">
            <text:p>1.12682523979795</text:p>
          </table:table-cell>
          <table:table-cell/>
          <table:table-cell office:value-type="string" calcext:value-type="string">
            <text:p>v3p</text:p>
          </table:table-cell>
          <table:table-cell table:formula="of:=0.00001729+0.00000001136*[.C3]" office:value-type="float" office:value="0.00001742632" calcext:value-type="float">
            <text:p>1.742632E-05</text:p>
          </table:table-cell>
          <table:table-cell/>
          <table:table-cell office:value-type="string" calcext:value-type="string">
            <text:p>rV</text:p>
          </table:table-cell>
          <table:table-cell table:formula="of:=1.3039-0.4054*[.I3]^(-1/3)" office:value-type="float" office:value="1.13148728388728" calcext:value-type="float">
            <text:p>1.13148728388728</text:p>
          </table:table-cell>
          <table:table-cell/>
          <table:table-cell office:value-type="string" calcext:value-type="string">
            <text:p>v3n</text:p>
          </table:table-cell>
          <table:table-cell table:formula="of:=0.00001994-0.00000002*[.I3]" office:value-type="float" office:value="0.00001968" calcext:value-type="float">
            <text:p>1.968E-05</text:p>
          </table:table-cell>
          <table:table-cell/>
          <table:table-cell office:value-type="string" calcext:value-type="string">
            <text:p>a0</text:p>
          </table:table-cell>
          <table:table-cell table:formula="of:=[.R12]" office:value-type="float" office:value="0.776" calcext:value-type="float">
            <text:p>0.776</text:p>
          </table:table-cell>
          <table:table-cell/>
          <table:table-cell office:value-type="string" calcext:value-type="string">
            <text:p>rr</text:p>
          </table:table-cell>
          <table:table-cell office:value-type="float" office:value="1.11" calcext:value-type="float">
            <text:p>1.11</text:p>
          </table:table-cell>
          <table:table-cell table:number-columns-repeated="2"/>
          <table:table-cell office:value-type="string" calcext:value-type="string">
            <text:p>ar</text:p>
          </table:table-cell>
          <table:table-cell table:formula="of:=0.719+0.0126*[.W3]" office:value-type="float" office:value="0.755842623501482" calcext:value-type="float">
            <text:p>0.755842623501482</text:p>
          </table:table-cell>
          <table:table-cell table:number-columns-repeated="3"/>
          <table:table-cell office:value-type="string" calcext:value-type="string">
            <text:p>Vr</text:p>
          </table:table-cell>
          <table:table-cell table:formula="of:=[.AA18]+[.AA19]*([.$AA$6]-[.$AA$7])" office:value-type="float" office:value="143.551721054758" calcext:value-type="float">
            <text:p>143.551721054758</text:p>
          </table:table-cell>
          <table:table-cell table:formula="of:=[.AB18]+[.AB19]*([.$AA$6]-[.$AA$7])" office:value-type="float" office:value="69.7099555212426" calcext:value-type="float">
            <text:p>69.7099555212426</text:p>
          </table:table-cell>
          <table:table-cell office:value-type="string" calcext:value-type="string">
            <text:p>MeV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0.6778-0.0001487*[.C3]" office:value-type="float" office:value="0.6760156" calcext:value-type="float">
            <text:p>0.6760156</text:p>
          </table:table-cell>
          <table:table-cell/>
          <table:table-cell office:value-type="string" calcext:value-type="string">
            <text:p>v4p</text:p>
          </table:table-cell>
          <table:table-cell table:formula="of:=0.000000007" office:value-type="float" office:value="0.000000007" calcext:value-type="float">
            <text:p>7E-09</text:p>
          </table:table-cell>
          <table:table-cell/>
          <table:table-cell office:value-type="string" calcext:value-type="string">
            <text:p>aV</text:p>
          </table:table-cell>
          <table:table-cell table:formula="of:=0.6778-0.0001487*[.I3]" office:value-type="float" office:value="0.6758669" calcext:value-type="float">
            <text:p>0.6758669</text:p>
          </table:table-cell>
          <table:table-cell/>
          <table:table-cell office:value-type="string" calcext:value-type="string">
            <text:p>v4n</text:p>
          </table:table-cell>
          <table:table-cell table:formula="of:=0.000000007" office:value-type="float" office:value="0.000000007" calcext:value-type="float">
            <text:p>7E-09</text:p>
          </table:table-cell>
          <table:table-cell/>
          <table:table-cell office:value-type="string" calcext:value-type="string">
            <text:p>Wv</text:p>
          </table:table-cell>
          <table:table-cell table:formula="of:=[.R13]/(1+EXP(([.R20]-[.R2])/[.R21]))" office:value-type="float" office:value="1.93039886571367" calcext:value-type="float">
            <text:p>1.93039886571367</text:p>
          </table:table-cell>
          <table:table-cell/>
          <table:table-cell office:value-type="string" calcext:value-type="string">
            <text:p>rr0</text:p>
          </table:table-cell>
          <table:table-cell office:value-type="float" office:value="-0.167" calcext:value-type="float">
            <text:p>-0.167</text:p>
          </table:table-cell>
          <table:table-cell table:number-columns-repeated="2"/>
          <table:table-cell office:value-type="string" calcext:value-type="string">
            <text:p>Wv</text:p>
          </table:table-cell>
          <table:table-cell table:formula="of:=1.104+0.0622*[.U5]" office:value-type="float" office:value="2.0992" calcext:value-type="float">
            <text:p>2.0992</text:p>
          </table:table-cell>
          <table:table-cell table:number-columns-repeated="3"/>
          <table:table-cell office:value-type="string" calcext:value-type="string">
            <text:p>R0</text:p>
          </table:table-cell>
          <table:table-cell table:formula="of:=[.AA20]*[.$AC$4]+[.AA21]+[.AA22]*([.$AA$6]-[.$AA$7])" office:value-type="float" office:value="2.26707607168198" calcext:value-type="float">
            <text:p>2.26707607168198</text:p>
          </table:table-cell>
          <table:table-cell table:formula="of:=[.AB20]*[.$AC$4]+[.AB21]+[.AB22]*([.$AA$6]-[.$AA$7])" office:value-type="float" office:value="3.38835415795786" calcext:value-type="float">
            <text:p>3.38835415795786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r0=R0/AT^1/3</text:p>
          </table:table-cell>
          <table:table-cell table:formula="of:=[.AA10]/[.AC4]" office:value-type="float" office:value="0.990236684146243" calcext:value-type="float">
            <text:p>0.990236684146243</text:p>
          </table:table-cell>
          <table:table-cell table:formula="of:=[.AB10]/[.AC4]" office:value-type="float" office:value="1.48" calcext:value-type="float">
            <text:p>1.4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Wd</text:p>
          </table:table-cell>
          <table:table-cell table:formula="of:=[.F13]*[.F2]^(2)/([.F2]^(2)+[.F15]^(2))*EXP(-1*[.F14]*[.F2])" office:value-type="float" office:value="6.59626904232993" calcext:value-type="float">
            <text:p>6.59626904232993</text:p>
          </table:table-cell>
          <table:table-cell/>
          <table:table-cell office:value-type="string" calcext:value-type="string">
            <text:p>w1p</text:p>
          </table:table-cell>
          <table:table-cell table:formula="of:=14.667+0.009629*[.C3]" office:value-type="float" office:value="14.782548" calcext:value-type="float">
            <text:p>14.782548</text:p>
          </table:table-cell>
          <table:table-cell/>
          <table:table-cell office:value-type="string" calcext:value-type="string">
            <text:p>Wd</text:p>
          </table:table-cell>
          <table:table-cell table:formula="of:=[.L13]*[.L2]^(2)/([.L2]^(2)+[.L15]^(2))*EXP(-1*[.L14]*[.L2])" office:value-type="float" office:value="7.17341729187584" calcext:value-type="float">
            <text:p>7.17341729187584</text:p>
          </table:table-cell>
          <table:table-cell/>
          <table:table-cell office:value-type="string" calcext:value-type="string">
            <text:p>w1n</text:p>
          </table:table-cell>
          <table:table-cell table:formula="of:=12.195+0.0167*[.I3]" office:value-type="float" office:value="12.4121" calcext:value-type="float">
            <text:p>12.4121</text:p>
          </table:table-cell>
          <table:table-cell/>
          <table:table-cell office:value-type="string" calcext:value-type="string">
            <text:p>rw0</text:p>
          </table:table-cell>
          <table:table-cell table:formula="of:=[.O8]" office:value-type="float" office:value="1.04322733598625" calcext:value-type="float">
            <text:p>1.04322733598625</text:p>
          </table:table-cell>
          <table:table-cell/>
          <table:table-cell office:value-type="string" calcext:value-type="string">
            <text:p>rre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  <table:table-cell office:value-type="string" calcext:value-type="string">
            <text:p>rv</text:p>
          </table:table-cell>
          <table:table-cell table:formula="of:=1.305+0.0997/[.W3]" office:value-type="float" office:value="1.33909692037673" calcext:value-type="float">
            <text:p>1.33909692037673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formula="of:=[.AA23]" office:value-type="float" office:value="0.792" calcext:value-type="float">
            <text:p>0.792</text:p>
          </table:table-cell>
          <table:table-cell table:formula="of:=[.AB23]" office:value-type="float" office:value="0.59" calcext:value-type="float">
            <text:p>0.59</text:p>
          </table:table-cell>
          <table:table-cell office:value-type="string" calcext:value-type="string">
            <text:p>fm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table:formula="of:=1.3424-0.01585*[.C3]^(1/3)" office:value-type="float" office:value="1.30611255851106" calcext:value-type="float">
            <text:p>1.30611255851106</text:p>
          </table:table-cell>
          <table:table-cell/>
          <table:table-cell office:value-type="string" calcext:value-type="string">
            <text:p>w2p</text:p>
          </table:table-cell>
          <table:table-cell table:formula="of:=73.55+0.0795*[.C3]" office:value-type="float" office:value="74.504" calcext:value-type="float">
            <text:p>74.504</text:p>
          </table:table-cell>
          <table:table-cell/>
          <table:table-cell office:value-type="string" calcext:value-type="string">
            <text:p>rD</text:p>
          </table:table-cell>
          <table:table-cell table:formula="of:=1.3424-0.01585*[.I3]^(1/3)" office:value-type="float" office:value="1.30513134519963" calcext:value-type="float">
            <text:p>1.30513134519963</text:p>
          </table:table-cell>
          <table:table-cell/>
          <table:table-cell office:value-type="string" calcext:value-type="string">
            <text:p>w2n</text:p>
          </table:table-cell>
          <table:table-cell table:formula="of:=73.55+0.0795*[.I3]" office:value-type="float" office:value="74.5835" calcext:value-type="float">
            <text:p>74.5835</text:p>
          </table:table-cell>
          <table:table-cell/>
          <table:table-cell office:value-type="string" calcext:value-type="string">
            <text:p>aw0</text:p>
          </table:table-cell>
          <table:table-cell table:formula="of:=[.O9]" office:value-type="float" office:value="0.776" calcext:value-type="float">
            <text:p>0.776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0.776" calcext:value-type="float">
            <text:p>0.776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formula="of:=0.855-0.1*[.W3]" office:value-type="float" office:value="0.562598226178713" calcext:value-type="float">
            <text:p>0.562598226178713</text:p>
          </table:table-cell>
          <table:table-cell table:number-columns-repeated="3"/>
          <table:table-cell office:value-type="string" calcext:value-type="string">
            <text:p>Wv</text:p>
          </table:table-cell>
          <table:table-cell table:formula="of:=[.AA24]/(1+EXP(([.AA30]-([.$AA$6]-[.$AA$7]))/[.AA31]))" office:value-type="float" office:value="2.17618540264008" calcext:value-type="float">
            <text:p>2.176185402640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formula="of:=0.5187+0.0005205*[.C3]" office:value-type="float" office:value="0.524946" calcext:value-type="float">
            <text:p>0.524946</text:p>
          </table:table-cell>
          <table:table-cell/>
          <table:table-cell office:value-type="string" calcext:value-type="string">
            <text:p>d1p</text:p>
          </table:table-cell>
          <table:table-cell table:formula="of:=16+16*[.F3]" office:value-type="float" office:value="16" calcext:value-type="float">
            <text:p>16</text:p>
          </table:table-cell>
          <table:table-cell/>
          <table:table-cell office:value-type="string" calcext:value-type="string">
            <text:p>aD</text:p>
          </table:table-cell>
          <table:table-cell table:formula="of:=0.5446+0.0001656*[.I3]" office:value-type="float" office:value="0.5467528" calcext:value-type="float">
            <text:p>0.5467528</text:p>
          </table:table-cell>
          <table:table-cell/>
          <table:table-cell office:value-type="string" calcext:value-type="string">
            <text:p>d1n</text:p>
          </table:table-cell>
          <table:table-cell table:formula="of:=16-16*[.L3]" office:value-type="float" office:value="17.2307692307692" calcext:value-type="float">
            <text:p>17.2307692307692</text:p>
          </table:table-cell>
          <table:table-cell/>
          <table:table-cell office:value-type="string" calcext:value-type="string">
            <text:p>Ws</text:p>
          </table:table-cell>
          <table:table-cell table:formula="of:=[.R14]/(1+EXP(([.R2]-[.R22])/[.R23]))" office:value-type="float" office:value="5.89633843701489" calcext:value-type="float">
            <text:p>5.89633843701489</text:p>
          </table:table-cell>
          <table:table-cell/>
          <table:table-cell office:value-type="string" calcext:value-type="string">
            <text:p>Wv0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Ws</text:p>
          </table:table-cell>
          <table:table-cell table:formula="of:=10.83-0.0306*[.U5]" office:value-type="float" office:value="10.3404" calcext:value-type="float">
            <text:p>10.3404</text:p>
          </table:table-cell>
          <table:table-cell table:number-columns-repeated="2"/>
          <table:table-cell table:style-name="ce3" office:value-type="string" calcext:value-type="string">
            <text:p>Rs=</text:p>
          </table:table-cell>
          <table:table-cell office:value-type="string" calcext:value-type="string">
            <text:p>Rw</text:p>
          </table:table-cell>
          <table:table-cell table:formula="of:=[.AA27]*[.$AC$4]+[.AA28]" office:value-type="float" office:value="3.11388273370253" calcext:value-type="float">
            <text:p>3.11388273370253</text:p>
          </table:table-cell>
          <table:table-cell table:formula="of:=[.AB27]*[.$AC$4]+[.AB28]" office:value-type="float" office:value="1.90022564263853" calcext:value-type="float">
            <text:p>1.90022564263853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rw=Rw/AT^1/3</text:p>
          </table:table-cell>
          <table:table-cell table:formula="of:=[.AA13]/[.AC4]" office:value-type="float" office:value="1.3601135628211" calcext:value-type="float">
            <text:p>1.3601135628211</text:p>
          </table:table-cell>
          <table:table-cell table:formula="of:=[.AB13]/[.AC4]" office:value-type="float" office:value="0.83" calcext:value-type="float">
            <text:p>0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Vso</text:p>
          </table:table-cell>
          <table:table-cell table:formula="of:=[.F16]*EXP(-1*[.F17]*[.F2])" office:value-type="float" office:value="5.15396486046176" calcext:value-type="float">
            <text:p>5.15396486046176</text:p>
          </table:table-cell>
          <table:table-cell/>
          <table:table-cell office:value-type="string" calcext:value-type="string">
            <text:p>d2p</text:p>
          </table:table-cell>
          <table:table-cell table:formula="of:=0.018+0.003802/(1+EXP(([.C3]-156)/8))" office:value-type="float" office:value="0.0218019999420956" calcext:value-type="float">
            <text:p>0.021801999942096</text:p>
          </table:table-cell>
          <table:table-cell/>
          <table:table-cell office:value-type="string" calcext:value-type="string">
            <text:p>Vso</text:p>
          </table:table-cell>
          <table:table-cell table:formula="of:=[.L16]*EXP(-1*[.L17]*[.L2])" office:value-type="float" office:value="5.66602929799549" calcext:value-type="float">
            <text:p>5.66602929799549</text:p>
          </table:table-cell>
          <table:table-cell/>
          <table:table-cell office:value-type="string" calcext:value-type="string">
            <text:p>d2n</text:p>
          </table:table-cell>
          <table:table-cell table:formula="of:=0.018+0.003802/(1+EXP(([.I3]-156)/8))" office:value-type="float" office:value="0.0218019999343857" calcext:value-type="float">
            <text:p>0.021801999934386</text:p>
          </table:table-cell>
          <table:table-cell/>
          <table:table-cell office:value-type="string" calcext:value-type="string">
            <text:p>rs0</text:p>
          </table:table-cell>
          <table:table-cell table:formula="of:=([.R15]*[.O3]^(1/3)+[.R16]+[.R17]*[.R2])/[.O3]^(1/3)" office:value-type="float" office:value="1.85032843084778" calcext:value-type="float">
            <text:p>1.85032843084778</text:p>
          </table:table-cell>
          <table:table-cell/>
          <table:table-cell office:value-type="string" calcext:value-type="string">
            <text:p>Ws0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string" calcext:value-type="string">
            <text:p>rs</text:p>
          </table:table-cell>
          <table:table-cell table:formula="of:=1.334+0.152/[.W3]" office:value-type="float" office:value="1.38598326877897" calcext:value-type="float">
            <text:p>1.38598326877897</text:p>
          </table:table-cell>
          <table:table-cell table:number-columns-repeated="3"/>
          <table:table-cell office:value-type="string" calcext:value-type="string">
            <text:p>aw</text:p>
          </table:table-cell>
          <table:table-cell table:formula="of:=[.AA29]" office:value-type="float" office:value="0.801" calcext:value-type="float">
            <text:p>0.801</text:p>
          </table:table-cell>
          <table:table-cell table:formula="of:=[.AB29]" office:value-type="float" office:value="1.047" calcext:value-type="float">
            <text:p>1.047</text:p>
          </table:table-cell>
          <table:table-cell office:value-type="string" calcext:value-type="string">
            <text:p>fm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Wso</text:p>
          </table:table-cell>
          <table:table-cell table:formula="of:=[.F18]*[.F2]^(2)/([.F2]^(2)+[.F19]^(2))" office:value-type="float" office:value="-0.151293161765459" calcext:value-type="float">
            <text:p>-0.151293161765459</text:p>
          </table:table-cell>
          <table:table-cell/>
          <table:table-cell office:value-type="string" calcext:value-type="string">
            <text:p>d3p</text:p>
          </table:table-cell>
          <table:table-cell table:formula="of:=11.5" office:value-type="float" office:value="11.5" calcext:value-type="float">
            <text:p>11.5</text:p>
          </table:table-cell>
          <table:table-cell/>
          <table:table-cell office:value-type="string" calcext:value-type="string">
            <text:p>Wso</text:p>
          </table:table-cell>
          <table:table-cell table:formula="of:=[.L18]*[.L2]^(2)/([.L2]^(2)+[.L19]^(2))" office:value-type="float" office:value="-0.0193707352348841" calcext:value-type="float">
            <text:p>-0.019370735234884</text:p>
          </table:table-cell>
          <table:table-cell/>
          <table:table-cell office:value-type="string" calcext:value-type="string">
            <text:p>d3n</text:p>
          </table:table-cell>
          <table:table-cell table:formula="of:=11.5" office:value-type="float" office:value="11.5" calcext:value-type="float">
            <text:p>11.5</text:p>
          </table:table-cell>
          <table:table-cell/>
          <table:table-cell office:value-type="string" calcext:value-type="string">
            <text:p>as0</text:p>
          </table:table-cell>
          <table:table-cell table:formula="of:=[.R18]" office:value-type="float" office:value="0.744" calcext:value-type="float">
            <text:p>0.744</text:p>
          </table:table-cell>
          <table:table-cell/>
          <table:table-cell office:value-type="string" calcext:value-type="string">
            <text:p>rw</text:p>
          </table:table-cell>
          <table:table-cell office:value-type="float" office:value="0.561" calcext:value-type="float">
            <text:p>0.561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formula="of:=0.531+0.062*[.W3]" office:value-type="float" office:value="0.712289099769198" calcext:value-type="float">
            <text:p>0.712289099769198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formula="of:=([.AA25]+[.$AC$5]*[.AA26]*[.$AC$3])/(1+EXP(([.$AA$6]-[.$AA$7]-[.AA32])/[.AA33]))" office:value-type="float" office:value="11.6041955748416" calcext:value-type="float">
            <text:p>11.6041955748416</text:p>
          </table:table-cell>
          <table:table-cell table:formula="of:=([.AB25]+[.$AC$5]*[.AB26]*[.$AC$3])/(1+EXP(([.$AA$6]-[.$AA$7]-[.AB32])/[.AB33]))" office:value-type="float" office:value="13.467254497408" calcext:value-type="float">
            <text:p>13.467254497408</text:p>
          </table:table-cell>
          <table:table-cell office:value-type="string" calcext:value-type="string">
            <text:p>MeV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rso</text:p>
          </table:table-cell>
          <table:table-cell table:formula="of:=1.1854-0.647*[.C3]^(-1/3)" office:value-type="float" office:value="0.902796719657807" calcext:value-type="float">
            <text:p>0.902796719657807</text:p>
          </table:table-cell>
          <table:table-cell/>
          <table:table-cell office:value-type="string" calcext:value-type="string">
            <text:p>vpso1</text:p>
          </table:table-cell>
          <table:table-cell table:formula="of:=5.922+0.003*[.C3]" office:value-type="float" office:value="5.958" calcext:value-type="float">
            <text:p>5.958</text:p>
          </table:table-cell>
          <table:table-cell/>
          <table:table-cell office:value-type="string" calcext:value-type="string">
            <text:p>rso</text:p>
          </table:table-cell>
          <table:table-cell table:formula="of:=1.1854-0.647*[.I3]^(-1/3)" office:value-type="float" office:value="0.910237130426905" calcext:value-type="float">
            <text:p>0.910237130426905</text:p>
          </table:table-cell>
          <table:table-cell/>
          <table:table-cell office:value-type="string" calcext:value-type="string">
            <text:p>vnso1</text:p>
          </table:table-cell>
          <table:table-cell table:formula="of:=5.922+0.003*[.I3]" office:value-type="float" office:value="5.961" calcext:value-type="float">
            <text:p>5.961</text:p>
          </table:table-cell>
          <table:table-cell/>
          <table:table-cell office:value-type="string" calcext:value-type="string">
            <text:p>rc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rw0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string" calcext:value-type="string">
            <text:p>Vso</text:p>
          </table:table-cell>
          <table:table-cell office:value-type="float" office:value="3.557" calcext:value-type="float">
            <text:p>3.557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fm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aso</text:p>
          </table:table-cell>
          <table:table-cell table:formula="of:=0.59" office:value-type="float" office:value="0.59" calcext:value-type="float">
            <text:p>0.59</text:p>
          </table:table-cell>
          <table:table-cell/>
          <table:table-cell office:value-type="string" calcext:value-type="string">
            <text:p>vpso2</text:p>
          </table:table-cell>
          <table:table-cell table:formula="of:=0.004" office:value-type="float" office:value="0.004" calcext:value-type="float">
            <text:p>0.004</text:p>
          </table:table-cell>
          <table:table-cell/>
          <table:table-cell office:value-type="string" calcext:value-type="string">
            <text:p>aso</text:p>
          </table:table-cell>
          <table:table-cell table:formula="of:=0.59" office:value-type="float" office:value="0.59" calcext:value-type="float">
            <text:p>0.59</text:p>
          </table:table-cell>
          <table:table-cell/>
          <table:table-cell office:value-type="string" calcext:value-type="string">
            <text:p>vnso2</text:p>
          </table:table-cell>
          <table:table-cell table:formula="of:=0.004" office:value-type="float" office:value="0.004" calcext:value-type="float">
            <text:p>0.004</text:p>
          </table:table-cell>
          <table:table-cell table:number-columns-repeated="4"/>
          <table:table-cell office:value-type="string" calcext:value-type="string">
            <text:p>rwe</text:p>
          </table:table-cell>
          <table:table-cell office:value-type="float" office:value="-0.00449" calcext:value-type="float">
            <text:p>-0.00449</text:p>
          </table:table-cell>
          <table:table-cell table:number-columns-repeated="2"/>
          <table:table-cell office:value-type="string" calcext:value-type="string">
            <text:p>rso</text:p>
          </table:table-cell>
          <table:table-cell office:value-type="float" office:value="0.972" calcext:value-type="float">
            <text:p>0.97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table:formula="of:=1.198+0.697*[.C3]^(-2/3) + 12.994*[.C3]^(-5/3)" office:value-type="float" office:value="1.53756676100631" calcext:value-type="float">
            <text:p>1.53756676100631</text:p>
          </table:table-cell>
          <table:table-cell/>
          <table:table-cell office:value-type="string" calcext:value-type="string">
            <text:p>wpso1</text:p>
          </table:table-cell>
          <table:table-cell table:formula="of:=-3.1" office:value-type="float" office:value="-3.1" calcext:value-type="float">
            <text:p>-3.1</text:p>
          </table:table-cell>
          <table:table-cell table:number-columns-repeated="4"/>
          <table:table-cell office:value-type="string" calcext:value-type="string">
            <text:p>wnso1</text:p>
          </table:table-cell>
          <table:table-cell table:formula="of:=-3.1" office:value-type="float" office:value="-3.1" calcext:value-type="float">
            <text:p>-3.1</text:p>
          </table:table-cell>
          <table:table-cell table:number-columns-repeated="4"/>
          <table:table-cell office:value-type="string" calcext:value-type="string">
            <text:p>aw</text:p>
          </table:table-cell>
          <table:table-cell office:value-type="float" office:value="0.744" calcext:value-type="float">
            <text:p>0.744</text:p>
          </table:table-cell>
          <table:table-cell table:number-columns-repeated="2"/>
          <table:table-cell office:value-type="string" calcext:value-type="string">
            <text:p>aso</text:p>
          </table:table-cell>
          <table:table-cell office:value-type="float" office:value="1.011" calcext:value-type="float">
            <text:p>1.011</text:p>
          </table:table-cell>
          <table:table-cell table:number-columns-repeated="3"/>
          <table:table-cell office:value-type="string" calcext:value-type="string">
            <text:p>V0</text:p>
          </table:table-cell>
          <table:table-cell office:value-type="float" office:value="155.1" calcext:value-type="float">
            <text:p>155.1</text:p>
          </table:table-cell>
          <table:table-cell office:value-type="float" office:value="80.1" calcext:value-type="float">
            <text:p>80.1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wpso2</text:p>
          </table:table-cell>
          <table:table-cell table:formula="of:=160"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wnso2</text:p>
          </table:table-cell>
          <table:table-cell table:formula="of:=160"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W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1.303" calcext:value-type="float">
            <text:p>1.303</text:p>
          </table:table-cell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-0.678" calcext:value-type="float">
            <text:p>-0.678</text:p>
          </table:table-cell>
          <table:table-cell office:value-type="float" office:value="-0.61" calcext:value-type="float">
            <text:p>-0.61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Epf</text:p>
          </table:table-cell>
          <table:table-cell table:formula="of:=-8.4075+0.01378*[.C3]" office:value-type="float" office:value="-8.24214" calcext:value-type="float">
            <text:p>-8.24214</text:p>
          </table:table-cell>
          <table:table-cell table:number-columns-repeated="4"/>
          <table:table-cell office:value-type="string" calcext:value-type="string">
            <text:p>Enf</text:p>
          </table:table-cell>
          <table:table-cell table:formula="of:=-11.2814+0.02646*[.I3]" office:value-type="float" office:value="-10.93742" calcext:value-type="float">
            <text:p>-10.93742</text:p>
          </table:table-cell>
          <table:table-cell table:number-columns-repeated="4"/>
          <table:table-cell office:value-type="string" calcext:value-type="string">
            <text:p>Wve0</text:p>
          </table:table-cell>
          <table:table-cell office:value-type="float" office:value="18.1" calcext:value-type="float">
            <text:p>18.1</text:p>
          </table:table-cell>
          <table:table-cell table:number-columns-repeated="7"/>
          <table:table-cell office:value-type="string" calcext:value-type="string">
            <text:p>r0</text:p>
          </table:table-cell>
          <table:table-cell office:value-type="float" office:value="0.92" calcext:value-type="float">
            <text:p>0.92</text:p>
          </table:table-cell>
          <table:table-cell office:value-type="float" office:value="1.48" calcext:value-type="float">
            <text:p>1.4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Vc</text:p>
          </table:table-cell>
          <table:table-cell table:formula="of:=1.73/([.C18])*[.C2]*[.C3]^(-1/3)" office:value-type="float" office:value="2.94873869997948" calcext:value-type="float">
            <text:p>2.94873869997948</text:p>
          </table:table-cell>
          <table:table-cell table:number-columns-repeated="10"/>
          <table:table-cell office:value-type="string" calcext:value-type="string">
            <text:p>Wvew</text:p>
          </table:table-cell>
          <table:table-cell office:value-type="float" office:value="5.97" calcext:value-type="float">
            <text:p>5.97</text:p>
          </table:table-cell>
          <table:table-cell table:number-columns-repeated="7"/>
          <table:table-cell office:value-type="string" calcext:value-type="string">
            <text:p>r0^0</text:p>
          </table:table-cell>
          <table:table-cell office:value-type="float" office:value="0.108" calcext:value-type="float">
            <text:p>0.108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string" calcext:value-type="string">
            <text:p>Wse0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string" calcext:value-type="string">
            <text:p>r0ae</text:p>
          </table:table-cell>
          <table:table-cell office:value-type="float" office:value="0.0031" calcext:value-type="float">
            <text:p>0.0031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string" calcext:value-type="string">
            <text:p>Wsew</text:p>
          </table:table-cell>
          <table:table-cell office:value-type="float" office:value="4.55" calcext:value-type="float">
            <text:p>4.55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float" office:value="0.792" calcext:value-type="float">
            <text:p>0.792</text:p>
          </table:table-cell>
          <table:table-cell office:value-type="float" office:value="0.59" calcext:value-type="float">
            <text:p>0.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Lab-CM converter</text:p>
          </table:table-cell>
          <table:table-cell table:number-columns-repeated="14"/>
          <table:table-cell office:value-type="string" calcext:value-type="string">
            <text:p>EC</text:p>
          </table:table-cell>
          <table:table-cell table:formula="of:=6*[.O2]*1.44/(5*[.O16]*([.O3])^(1/3))" office:value-type="float" office:value="3.95716332226388" calcext:value-type="float">
            <text:p>3.95716332226388</text:p>
          </table:table-cell>
          <table:table-cell table:number-columns-repeated="7"/>
          <table:table-cell office:value-type="string" calcext:value-type="string">
            <text:p>Wv0</text:p>
          </table:table-cell>
          <table:table-cell office:value-type="float" office:value="33.1" calcext:value-type="float">
            <text:p>33.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string" calcext:value-type="string">
            <text:p>Ws0</text:p>
          </table:table-cell>
          <table:table-cell office:value-type="float" office:value="21.8" calcext:value-type="float">
            <text:p>21.8</text:p>
          </table:table-cell>
          <table:table-cell office:value-type="float" office:value="25.3" calcext:value-type="float">
            <text:p>2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2" calcext:value-type="float">
            <text:p>12</text:p>
          </table:table-cell>
          <table:table-cell table:number-columns-repeated="22"/>
          <table:table-cell office:value-type="string" calcext:value-type="string">
            <text:p>WST</text:p>
          </table:table-cell>
          <table:table-cell office:value-type="float" office:value="13.1" calcext:value-type="float">
            <text:p>13.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El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V</text:p>
          </table:table-cell>
          <table:table-cell table:number-columns-repeated="21"/>
          <table:table-cell office:value-type="string" calcext:value-type="string">
            <text:p>rw</text:p>
          </table:table-cell>
          <table:table-cell office:value-type="float" office:value="1.43" calcext:value-type="float">
            <text:p>1.43</text:p>
          </table:table-cell>
          <table:table-cell office:value-type="float" office:value="0.83" calcext:value-type="float">
            <text:p>0.8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table:formula="of:=[.C26]/([.C25]+[.C26])*[.C27]" office:value-type="float" office:value="13.6" calcext:value-type="float">
            <text:p>13.6</text:p>
          </table:table-cell>
          <table:table-cell office:value-type="string" calcext:value-type="string">
            <text:p>MeV</text:p>
          </table:table-cell>
          <table:table-cell table:number-columns-repeated="21"/>
          <table:table-cell office:value-type="string" calcext:value-type="string">
            <text:p>rw^0</text:p>
          </table:table-cell>
          <table:table-cell office:value-type="float" office:value="-0.16" calcext:value-type="float">
            <text:p>-0.1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aw</text:p>
          </table:table-cell>
          <table:table-cell office:value-type="float" office:value="0.801" calcext:value-type="float">
            <text:p>0.801</text:p>
          </table:table-cell>
          <table:table-cell office:value-type="float" office:value="1.047" calcext:value-type="float">
            <text:p>1.047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ve0</text:p>
          </table:table-cell>
          <table:table-cell office:value-type="float" office:value="156.1" calcext:value-type="float">
            <text:p>156.1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Wvew</text:p>
          </table:table-cell>
          <table:table-cell office:value-type="float" office:value="52.4" calcext:value-type="float">
            <text:p>52.4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Wse0</text:p>
          </table:table-cell>
          <table:table-cell table:number-columns-repeated="2" office:value-type="float" office:value="30.8" calcext:value-type="float">
            <text:p>30.8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sew</text:p>
          </table:table-cell>
          <table:table-cell table:number-columns-repeated="2" office:value-type="float" office:value="106.4" calcext:value-type="float">
            <text:p>106.4</text:p>
          </table:table-cell>
          <table:table-cell table:number-columns-repeated="99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42:28.062100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4:41:21.282727734</meta:creation-date>
    <dc:date>2022-05-19T11:34:19.865097676</dc:date>
    <meta:editing-duration>P11DT15H31M23S</meta:editing-duration>
    <meta:editing-cycles>96</meta:editing-cycles>
    <meta:generator>LibreOffice/6.4.7.2$Linux_X86_64 LibreOffice_project/40$Build-2</meta:generator>
    <meta:document-statistic meta:table-count="1" meta:cell-count="358" meta:object-count="0"/>
  </office:meta>
</office:document-meta>
</file>