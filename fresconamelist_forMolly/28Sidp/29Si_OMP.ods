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3929in"/>
    </style:style>
    <style:style style:name="co2" style:family="table-column">
      <style:table-column-properties fo:break-before="auto" style:column-width="1.062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311in"/>
    </style:style>
    <style:style style:name="co5" style:family="table-column">
      <style:table-column-properties fo:break-before="auto" style:column-width="1.2575in"/>
    </style:style>
    <style:style style:name="ro1" style:family="table-row">
      <style:table-row-properties style:row-height="0.404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24pt" fo:font-weight="bold" style:font-size-asian="24pt" style:font-weight-asian="bold" style:font-size-complex="2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ext-properties style:font-name="Liberation Sans1"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 style:data-style-name="N100"/>
    <style:style style:name="T1" style:family="text">
      <style:text-properties style:font-name="Liberation Sans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28Si(d,p) 29Si OMPs</text:p>
          </table:table-cell>
          <table:table-cell table:style-name="ce1"/>
          <table:table-cell table:number-columns-repeated="7"/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string" calcext:value-type="string">
            <text:p>V0 = -55.8 + 0.32*E</text:p>
          </table:table-cell>
          <table:table-cell/>
          <table:table-cell office:value-type="float" office:value="-55.8" calcext:value-type="float">
            <text:p>-55.8</text:p>
          </table:table-cell>
          <table:table-cell office:value-type="float" office:value="0.32" calcext:value-type="float">
            <text:p>0.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Wv = 2.7 – 0.22*E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0.22" calcext:value-type="float">
            <text:p>0.2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Ws = 47.2 – E</text:p>
          </table:table-cell>
          <table:table-cell/>
          <table:table-cell office:value-type="float" office:value="47.2" calcext:value-type="float">
            <text:p>47.2</text:p>
          </table:table-cell>
          <table:table-cell table:number-columns-repeated="6"/>
        </table:table-row>
        <table:table-row table:style-name="ro2" table:number-rows-repeated="2">
          <table:table-cell table:number-columns-repeated="9"/>
        </table:table-row>
        <table:table-row table:style-name="ro3">
          <table:table-cell table:style-name="ce2" office:value-type="string" calcext:value-type="string">
            <text:p>Ex (keV)</text:p>
          </table:table-cell>
          <table:table-cell table:style-name="ce2" office:value-type="string" calcext:value-type="string">
            <text:p>Ex (MeV)</text:p>
          </table:table-cell>
          <table:table-cell table:style-name="ce3" office:value-type="string" calcext:value-type="string">
            <text:p>ΔE</text:p>
          </table:table-cell>
          <table:table-cell table:style-name="ce4" office:value-type="string" calcext:value-type="string">
            <text:p>J<text:span text:style-name="T1">π</text:span></text:p>
          </table:table-cell>
          <table:table-cell/>
          <table:table-cell table:style-name="ce4" office:value-type="string" calcext:value-type="string">
            <text:p>V0 (MeV)</text:p>
          </table:table-cell>
          <table:table-cell table:style-name="ce4" office:value-type="string" calcext:value-type="string">
            <text:p>Wv (MeV)</text:p>
          </table:table-cell>
          <table:table-cell table:style-name="ce4" office:value-type="string" calcext:value-type="string">
            <text:p>4Ws (MeV)</text:p>
          </table:table-cell>
          <table:table-cell table:style-name="ce4" office:value-type="string" calcext:value-type="string">
            <text:p>Ws (MeV)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[.A10]/1000" office:value-type="float" office:value="0" calcext:value-type="float">
            <text:p>0</text:p>
          </table:table-cell>
          <table:table-cell/>
          <table:table-cell office:value-type="string" calcext:value-type="string">
            <text:p>1/2+</text:p>
          </table:table-cell>
          <table:table-cell/>
          <table:table-cell table:formula="of:=[.$C$4]+[.$D$4]*[.B10]" office:value-type="float" office:value="-55.8" calcext:value-type="float">
            <text:p>-55.8</text:p>
          </table:table-cell>
          <table:table-cell table:formula="of:=[.$C$5]-[.$D$5]*[.B10]" office:value-type="float" office:value="2.7" calcext:value-type="float">
            <text:p>2.7</text:p>
          </table:table-cell>
          <table:table-cell table:formula="of:=[.$C$6]-[.B10]" office:value-type="float" office:value="47.2" calcext:value-type="float">
            <text:p>47.2</text:p>
          </table:table-cell>
          <table:table-cell table:formula="of:=[.H10]/4" office:value-type="float" office:value="11.8" calcext:value-type="float">
            <text:p>11.8</text:p>
          </table:table-cell>
        </table:table-row>
        <table:table-row table:style-name="ro2">
          <table:table-cell office:value-type="float" office:value="1273.387" calcext:value-type="float">
            <text:p>1273.387</text:p>
          </table:table-cell>
          <table:table-cell table:formula="of:=[.A11]/1000" office:value-type="float" office:value="1.273387" calcext:value-type="float">
            <text:p>1.273387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3/2+</text:p>
          </table:table-cell>
          <table:table-cell/>
          <table:table-cell table:formula="of:=[.$C$4]+[.$D$4]*[.B11]" office:value-type="float" office:value="-55.39251616" calcext:value-type="float">
            <text:p>-55.39251616</text:p>
          </table:table-cell>
          <table:table-cell table:formula="of:=[.$C$5]-[.$D$5]*[.B11]" office:value-type="float" office:value="2.41985486" calcext:value-type="float">
            <text:p>2.41985486</text:p>
          </table:table-cell>
          <table:table-cell table:formula="of:=[.$C$6]-[.B11]" office:value-type="float" office:value="45.926613" calcext:value-type="float">
            <text:p>45.926613</text:p>
          </table:table-cell>
          <table:table-cell table:formula="of:=[.H11]/4" office:value-type="float" office:value="11.48165325" calcext:value-type="float">
            <text:p>11.48165325</text:p>
          </table:table-cell>
        </table:table-row>
        <table:table-row table:style-name="ro2">
          <table:table-cell office:value-type="float" office:value="2028.16" calcext:value-type="float">
            <text:p>2028.16</text:p>
          </table:table-cell>
          <table:table-cell table:formula="of:=[.A12]/1000" office:value-type="float" office:value="2.02816" calcext:value-type="float">
            <text:p>2.02816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5/2+</text:p>
          </table:table-cell>
          <table:table-cell/>
          <table:table-cell table:formula="of:=[.$C$4]+[.$D$4]*[.B12]" office:value-type="float" office:value="-55.1509888" calcext:value-type="float">
            <text:p>-55.1509888</text:p>
          </table:table-cell>
          <table:table-cell table:formula="of:=[.$C$5]-[.$D$5]*[.B12]" office:value-type="float" office:value="2.2538048" calcext:value-type="float">
            <text:p>2.2538048</text:p>
          </table:table-cell>
          <table:table-cell table:formula="of:=[.$C$6]-[.B12]" office:value-type="float" office:value="45.17184" calcext:value-type="float">
            <text:p>45.17184</text:p>
          </table:table-cell>
          <table:table-cell table:formula="of:=[.H12]/4" office:value-type="float" office:value="11.29296" calcext:value-type="float">
            <text:p>11.29296</text:p>
          </table:table-cell>
        </table:table-row>
        <table:table-row table:style-name="ro2">
          <table:table-cell office:value-type="float" office:value="2425.97" calcext:value-type="float">
            <text:p>2425.97</text:p>
          </table:table-cell>
          <table:table-cell table:formula="of:=[.A13]/1000" office:value-type="float" office:value="2.42597" calcext:value-type="float">
            <text:p>2.42597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3/2+</text:p>
          </table:table-cell>
          <table:table-cell/>
          <table:table-cell table:formula="of:=[.$C$4]+[.$D$4]*[.B13]" office:value-type="float" office:value="-55.0236896" calcext:value-type="float">
            <text:p>-55.0236896</text:p>
          </table:table-cell>
          <table:table-cell table:formula="of:=[.$C$5]-[.$D$5]*[.B13]" office:value-type="float" office:value="2.1662866" calcext:value-type="float">
            <text:p>2.1662866</text:p>
          </table:table-cell>
          <table:table-cell table:formula="of:=[.$C$6]-[.B13]" office:value-type="float" office:value="44.77403" calcext:value-type="float">
            <text:p>44.77403</text:p>
          </table:table-cell>
          <table:table-cell table:formula="of:=[.H13]/4" office:value-type="float" office:value="11.1935075" calcext:value-type="float">
            <text:p>11.1935075</text:p>
          </table:table-cell>
        </table:table-row>
        <table:table-row table:style-name="ro2">
          <table:table-cell office:value-type="float" office:value="3067.13" calcext:value-type="float">
            <text:p>3067.13</text:p>
          </table:table-cell>
          <table:table-cell table:formula="of:=[.A14]/1000" office:value-type="float" office:value="3.06713" calcext:value-type="float">
            <text:p>3.06713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5/2+</text:p>
          </table:table-cell>
          <table:table-cell/>
          <table:table-cell table:formula="of:=[.$C$4]+[.$D$4]*[.B14]" office:value-type="float" office:value="-54.8185184" calcext:value-type="float">
            <text:p>-54.8185184</text:p>
          </table:table-cell>
          <table:table-cell table:formula="of:=[.$C$5]-[.$D$5]*[.B14]" office:value-type="float" office:value="2.0252314" calcext:value-type="float">
            <text:p>2.0252314</text:p>
          </table:table-cell>
          <table:table-cell table:formula="of:=[.$C$6]-[.B14]" office:value-type="float" office:value="44.13287" calcext:value-type="float">
            <text:p>44.13287</text:p>
          </table:table-cell>
          <table:table-cell table:formula="of:=[.H14]/4" office:value-type="float" office:value="11.0332175" calcext:value-type="float">
            <text:p>11.0332175</text:p>
          </table:table-cell>
        </table:table-row>
        <table:table-row table:style-name="ro2">
          <table:table-cell office:value-type="float" office:value="3623.49" calcext:value-type="float">
            <text:p>3623.49</text:p>
          </table:table-cell>
          <table:table-cell table:formula="of:=[.A15]/1000" office:value-type="float" office:value="3.62349" calcext:value-type="float">
            <text:p>3.62349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7/2-</text:p>
          </table:table-cell>
          <table:table-cell/>
          <table:table-cell table:formula="of:=[.$C$4]+[.$D$4]*[.B15]" office:value-type="float" office:value="-54.6404832" calcext:value-type="float">
            <text:p>-54.6404832</text:p>
          </table:table-cell>
          <table:table-cell table:formula="of:=[.$C$5]-[.$D$5]*[.B15]" office:value-type="float" office:value="1.9028322" calcext:value-type="float">
            <text:p>1.9028322</text:p>
          </table:table-cell>
          <table:table-cell table:formula="of:=[.$C$6]-[.B15]" office:value-type="float" office:value="43.57651" calcext:value-type="float">
            <text:p>43.57651</text:p>
          </table:table-cell>
          <table:table-cell table:formula="of:=[.H15]/4" office:value-type="float" office:value="10.8941275" calcext:value-type="float">
            <text:p>10.8941275</text:p>
          </table:table-cell>
        </table:table-row>
        <table:table-row table:style-name="ro2">
          <table:table-cell office:value-type="float" office:value="4079.9" calcext:value-type="float">
            <text:p>4079.9</text:p>
          </table:table-cell>
          <table:table-cell table:formula="of:=[.A16]/1000" office:value-type="float" office:value="4.0799" calcext:value-type="float">
            <text:p>4.0799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7/2+</text:p>
          </table:table-cell>
          <table:table-cell/>
          <table:table-cell table:formula="of:=[.$C$4]+[.$D$4]*[.B16]" office:value-type="float" office:value="-54.494432" calcext:value-type="float">
            <text:p>-54.494432</text:p>
          </table:table-cell>
          <table:table-cell table:formula="of:=[.$C$5]-[.$D$5]*[.B16]" office:value-type="float" office:value="1.802422" calcext:value-type="float">
            <text:p>1.802422</text:p>
          </table:table-cell>
          <table:table-cell table:formula="of:=[.$C$6]-[.B16]" office:value-type="float" office:value="43.1201" calcext:value-type="float">
            <text:p>43.1201</text:p>
          </table:table-cell>
          <table:table-cell table:formula="of:=[.H16]/4" office:value-type="float" office:value="10.780025" calcext:value-type="float">
            <text:p>10.780025</text:p>
          </table:table-cell>
        </table:table-row>
        <table:table-row table:style-name="ro2">
          <table:table-cell office:value-type="float" office:value="4741.1" calcext:value-type="float">
            <text:p>4741.1</text:p>
          </table:table-cell>
          <table:table-cell table:formula="of:=[.A17]/1000" office:value-type="float" office:value="4.7411" calcext:value-type="float">
            <text:p>4.7411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(9/2+)</text:p>
          </table:table-cell>
          <table:table-cell/>
          <table:table-cell table:formula="of:=[.$C$4]+[.$D$4]*[.B17]" office:value-type="float" office:value="-54.282848" calcext:value-type="float">
            <text:p>-54.282848</text:p>
          </table:table-cell>
          <table:table-cell table:formula="of:=[.$C$5]-[.$D$5]*[.B17]" office:value-type="float" office:value="1.656958" calcext:value-type="float">
            <text:p>1.656958</text:p>
          </table:table-cell>
          <table:table-cell table:formula="of:=[.$C$6]-[.B17]" office:value-type="float" office:value="42.4589" calcext:value-type="float">
            <text:p>42.4589</text:p>
          </table:table-cell>
          <table:table-cell table:formula="of:=[.H17]/4" office:value-type="float" office:value="10.614725" calcext:value-type="float">
            <text:p>10.614725</text:p>
          </table:table-cell>
        </table:table-row>
        <table:table-row table:style-name="ro2">
          <table:table-cell office:value-type="float" office:value="4840.38" calcext:value-type="float">
            <text:p>4840.38</text:p>
          </table:table-cell>
          <table:table-cell table:formula="of:=[.A18]/1000" office:value-type="float" office:value="4.84038" calcext:value-type="float">
            <text:p>4.84038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1/2+</text:p>
          </table:table-cell>
          <table:table-cell/>
          <table:table-cell table:formula="of:=[.$C$4]+[.$D$4]*[.B18]" office:value-type="float" office:value="-54.2510784" calcext:value-type="float">
            <text:p>-54.2510784</text:p>
          </table:table-cell>
          <table:table-cell table:formula="of:=[.$C$5]-[.$D$5]*[.B18]" office:value-type="float" office:value="1.6351164" calcext:value-type="float">
            <text:p>1.6351164</text:p>
          </table:table-cell>
          <table:table-cell table:formula="of:=[.$C$6]-[.B18]" office:value-type="float" office:value="42.35962" calcext:value-type="float">
            <text:p>42.35962</text:p>
          </table:table-cell>
          <table:table-cell table:formula="of:=[.H18]/4" office:value-type="float" office:value="10.589905" calcext:value-type="float">
            <text:p>10.589905</text:p>
          </table:table-cell>
        </table:table-row>
        <table:table-row table:style-name="ro2">
          <table:table-cell office:value-type="float" office:value="4895.2" calcext:value-type="float">
            <text:p>4895.2</text:p>
          </table:table-cell>
          <table:table-cell table:formula="of:=[.A19]/1000" office:value-type="float" office:value="4.8952" calcext:value-type="float">
            <text:p>4.8952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5/2+</text:p>
          </table:table-cell>
          <table:table-cell/>
          <table:table-cell table:formula="of:=[.$C$4]+[.$D$4]*[.B19]" office:value-type="float" office:value="-54.233536" calcext:value-type="float">
            <text:p>-54.233536</text:p>
          </table:table-cell>
          <table:table-cell table:formula="of:=[.$C$5]-[.$D$5]*[.B19]" office:value-type="float" office:value="1.623056" calcext:value-type="float">
            <text:p>1.623056</text:p>
          </table:table-cell>
          <table:table-cell table:formula="of:=[.$C$6]-[.B19]" office:value-type="float" office:value="42.3048" calcext:value-type="float">
            <text:p>42.3048</text:p>
          </table:table-cell>
          <table:table-cell table:formula="of:=[.H19]/4" office:value-type="float" office:value="10.5762" calcext:value-type="float">
            <text:p>10.5762</text:p>
          </table:table-cell>
        </table:table-row>
        <table:table-row table:style-name="ro2">
          <table:table-cell office:value-type="float" office:value="4934.438" calcext:value-type="float">
            <text:p>4934.438</text:p>
          </table:table-cell>
          <table:table-cell table:formula="of:=[.A20]/1000" office:value-type="float" office:value="4.934438" calcext:value-type="float">
            <text:p>4.934438</text:p>
          </table:table-cell>
          <table:table-cell office:value-type="float" office:value="0.023" calcext:value-type="float">
            <text:p>0.023</text:p>
          </table:table-cell>
          <table:table-cell office:value-type="string" calcext:value-type="string">
            <text:p>3/2-</text:p>
          </table:table-cell>
          <table:table-cell/>
          <table:table-cell table:formula="of:=[.$C$4]+[.$D$4]*[.B20]" office:value-type="float" office:value="-54.22097984" calcext:value-type="float">
            <text:p>-54.22097984</text:p>
          </table:table-cell>
          <table:table-cell table:formula="of:=[.$C$5]-[.$D$5]*[.B20]" office:value-type="float" office:value="1.61442364" calcext:value-type="float">
            <text:p>1.61442364</text:p>
          </table:table-cell>
          <table:table-cell table:formula="of:=[.$C$6]-[.B20]" office:value-type="float" office:value="42.265562" calcext:value-type="float">
            <text:p>42.265562</text:p>
          </table:table-cell>
          <table:table-cell table:formula="of:=[.H20]/4" office:value-type="float" office:value="10.5663905" calcext:value-type="float">
            <text:p>10.5663905</text:p>
          </table:table-cell>
        </table:table-row>
        <table:table-row table:style-name="ro2">
          <table:table-cell office:value-type="float" office:value="5254.4" calcext:value-type="float">
            <text:p>5254.4</text:p>
          </table:table-cell>
          <table:table-cell table:formula="of:=[.A21]/1000" office:value-type="float" office:value="5.2544" calcext:value-type="float">
            <text:p>5.2544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(9/2-)</text:p>
          </table:table-cell>
          <table:table-cell/>
          <table:table-cell table:formula="of:=[.$C$4]+[.$D$4]*[.B21]" office:value-type="float" office:value="-54.118592" calcext:value-type="float">
            <text:p>-54.118592</text:p>
          </table:table-cell>
          <table:table-cell table:formula="of:=[.$C$5]-[.$D$5]*[.B21]" office:value-type="float" office:value="1.544032" calcext:value-type="float">
            <text:p>1.544032</text:p>
          </table:table-cell>
          <table:table-cell table:formula="of:=[.$C$6]-[.B21]" office:value-type="float" office:value="41.9456" calcext:value-type="float">
            <text:p>41.9456</text:p>
          </table:table-cell>
          <table:table-cell table:formula="of:=[.H21]/4" office:value-type="float" office:value="10.4864" calcext:value-type="float">
            <text:p>10.4864</text:p>
          </table:table-cell>
        </table:table-row>
        <table:table-row table:style-name="ro2">
          <table:table-cell office:value-type="float" office:value="5284.7" calcext:value-type="float">
            <text:p>5284.7</text:p>
          </table:table-cell>
          <table:table-cell table:formula="of:=[.A22]/1000" office:value-type="float" office:value="5.2847" calcext:value-type="float">
            <text:p>5.2847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7/2+</text:p>
          </table:table-cell>
          <table:table-cell/>
          <table:table-cell table:formula="of:=[.$C$4]+[.$D$4]*[.B22]" office:value-type="float" office:value="-54.108896" calcext:value-type="float">
            <text:p>-54.108896</text:p>
          </table:table-cell>
          <table:table-cell table:formula="of:=[.$C$5]-[.$D$5]*[.B22]" office:value-type="float" office:value="1.537366" calcext:value-type="float">
            <text:p>1.537366</text:p>
          </table:table-cell>
          <table:table-cell table:formula="of:=[.$C$6]-[.B22]" office:value-type="float" office:value="41.9153" calcext:value-type="float">
            <text:p>41.9153</text:p>
          </table:table-cell>
          <table:table-cell table:formula="of:=[.H22]/4" office:value-type="float" office:value="10.478825" calcext:value-type="float">
            <text:p>10.478825</text:p>
          </table:table-cell>
        </table:table-row>
        <table:table-row table:style-name="ro2">
          <table:table-cell office:value-type="float" office:value="5652.2" calcext:value-type="float">
            <text:p>5652.2</text:p>
          </table:table-cell>
          <table:table-cell table:formula="of:=[.A23]/1000" office:value-type="float" office:value="5.6522" calcext:value-type="float">
            <text:p>5.6522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9/2+</text:p>
          </table:table-cell>
          <table:table-cell/>
          <table:table-cell table:formula="of:=[.$C$4]+[.$D$4]*[.B23]" office:value-type="float" office:value="-53.991296" calcext:value-type="float">
            <text:p>-53.991296</text:p>
          </table:table-cell>
          <table:table-cell table:formula="of:=[.$C$5]-[.$D$5]*[.B23]" office:value-type="float" office:value="1.456516" calcext:value-type="float">
            <text:p>1.456516</text:p>
          </table:table-cell>
          <table:table-cell table:formula="of:=[.$C$6]-[.B23]" office:value-type="float" office:value="41.5478" calcext:value-type="float">
            <text:p>41.5478</text:p>
          </table:table-cell>
          <table:table-cell table:formula="of:=[.H23]/4" office:value-type="float" office:value="10.38695" calcext:value-type="float">
            <text:p>10.38695</text:p>
          </table:table-cell>
        </table:table-row>
        <table:table-row table:style-name="ro2">
          <table:table-cell office:value-type="float" office:value="5811.7" calcext:value-type="float">
            <text:p>5811.7</text:p>
          </table:table-cell>
          <table:table-cell table:formula="of:=[.A24]/1000" office:value-type="float" office:value="5.8117" calcext:value-type="float">
            <text:p>5.8117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7/2+</text:p>
          </table:table-cell>
          <table:table-cell/>
          <table:table-cell table:formula="of:=[.$C$4]+[.$D$4]*[.B24]" office:value-type="float" office:value="-53.940256" calcext:value-type="float">
            <text:p>-53.940256</text:p>
          </table:table-cell>
          <table:table-cell table:formula="of:=[.$C$5]-[.$D$5]*[.B24]" office:value-type="float" office:value="1.421426" calcext:value-type="float">
            <text:p>1.421426</text:p>
          </table:table-cell>
          <table:table-cell table:formula="of:=[.$C$6]-[.B24]" office:value-type="float" office:value="41.3883" calcext:value-type="float">
            <text:p>41.3883</text:p>
          </table:table-cell>
          <table:table-cell table:formula="of:=[.H24]/4" office:value-type="float" office:value="10.347075" calcext:value-type="float">
            <text:p>10.347075</text:p>
          </table:table-cell>
        </table:table-row>
        <table:table-row table:style-name="ro2">
          <table:table-cell office:value-type="float" office:value="5947" calcext:value-type="float">
            <text:p>5947</text:p>
          </table:table-cell>
          <table:table-cell table:formula="of:=[.A25]/1000" office:value-type="float" office:value="5.947" calcext:value-type="float">
            <text:p>5.9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/2+</text:p>
          </table:table-cell>
          <table:table-cell/>
          <table:table-cell table:formula="of:=[.$C$4]+[.$D$4]*[.B25]" office:value-type="float" office:value="-53.89696" calcext:value-type="float">
            <text:p>-53.89696</text:p>
          </table:table-cell>
          <table:table-cell table:formula="of:=[.$C$5]-[.$D$5]*[.B25]" office:value-type="float" office:value="1.39166" calcext:value-type="float">
            <text:p>1.39166</text:p>
          </table:table-cell>
          <table:table-cell table:formula="of:=[.$C$6]-[.B25]" office:value-type="float" office:value="41.253" calcext:value-type="float">
            <text:p>41.253</text:p>
          </table:table-cell>
          <table:table-cell table:formula="of:=[.H25]/4" office:value-type="float" office:value="10.31325" calcext:value-type="float">
            <text:p>10.31325</text:p>
          </table:table-cell>
        </table:table-row>
        <table:table-row table:style-name="ro2">
          <table:table-cell office:value-type="float" office:value="6107.1" calcext:value-type="float">
            <text:p>6107.1</text:p>
          </table:table-cell>
          <table:table-cell table:formula="of:=[.A26]/1000" office:value-type="float" office:value="6.1071" calcext:value-type="float">
            <text:p>6.1071</text:p>
          </table:table-cell>
          <table:table-cell office:value-type="float" office:value="0.5" calcext:value-type="float">
            <text:p>0.5</text:p>
          </table:table-cell>
          <table:table-cell table:style-name="ce5" office:value-type="string" calcext:value-type="string">
            <text:p>5/2</text:p>
          </table:table-cell>
          <table:table-cell/>
          <table:table-cell table:formula="of:=[.$C$4]+[.$D$4]*[.B26]" office:value-type="float" office:value="-53.845728" calcext:value-type="float">
            <text:p>-53.845728</text:p>
          </table:table-cell>
          <table:table-cell table:formula="of:=[.$C$5]-[.$D$5]*[.B26]" office:value-type="float" office:value="1.356438" calcext:value-type="float">
            <text:p>1.356438</text:p>
          </table:table-cell>
          <table:table-cell table:formula="of:=[.$C$6]-[.B26]" office:value-type="float" office:value="41.0929" calcext:value-type="float">
            <text:p>41.0929</text:p>
          </table:table-cell>
          <table:table-cell table:formula="of:=[.H26]/4" office:value-type="float" office:value="10.273225" calcext:value-type="float">
            <text:p>10.273225</text:p>
          </table:table-cell>
        </table:table-row>
        <table:table-row table:style-name="ro2">
          <table:table-cell office:value-type="float" office:value="6192.8" calcext:value-type="float">
            <text:p>6192.8</text:p>
          </table:table-cell>
          <table:table-cell table:formula="of:=[.A27]/1000" office:value-type="float" office:value="6.1928" calcext:value-type="float">
            <text:p>6.1928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7/2-</text:p>
          </table:table-cell>
          <table:table-cell/>
          <table:table-cell table:formula="of:=[.$C$4]+[.$D$4]*[.B27]" office:value-type="float" office:value="-53.818304" calcext:value-type="float">
            <text:p>-53.818304</text:p>
          </table:table-cell>
          <table:table-cell table:formula="of:=[.$C$5]-[.$D$5]*[.B27]" office:value-type="float" office:value="1.337584" calcext:value-type="float">
            <text:p>1.337584</text:p>
          </table:table-cell>
          <table:table-cell table:formula="of:=[.$C$6]-[.B27]" office:value-type="float" office:value="41.0072" calcext:value-type="float">
            <text:p>41.0072</text:p>
          </table:table-cell>
          <table:table-cell table:formula="of:=[.H27]/4" office:value-type="float" office:value="10.2518" calcext:value-type="float">
            <text:p>10.2518</text:p>
          </table:table-cell>
        </table:table-row>
        <table:table-row table:style-name="ro2">
          <table:table-cell office:value-type="float" office:value="6380.61" calcext:value-type="float">
            <text:p>6380.61</text:p>
          </table:table-cell>
          <table:table-cell table:formula="of:=[.A28]/1000" office:value-type="float" office:value="6.38061" calcext:value-type="float">
            <text:p>6.38061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1/2-</text:p>
          </table:table-cell>
          <table:table-cell/>
          <table:table-cell table:formula="of:=[.$C$4]+[.$D$4]*[.B28]" office:value-type="float" office:value="-53.7582048" calcext:value-type="float">
            <text:p>-53.7582048</text:p>
          </table:table-cell>
          <table:table-cell table:formula="of:=[.$C$5]-[.$D$5]*[.B28]" office:value-type="float" office:value="1.2962658" calcext:value-type="float">
            <text:p>1.2962658</text:p>
          </table:table-cell>
          <table:table-cell table:formula="of:=[.$C$6]-[.B28]" office:value-type="float" office:value="40.81939" calcext:value-type="float">
            <text:p>40.81939</text:p>
          </table:table-cell>
          <table:table-cell table:formula="of:=[.H28]/4" office:value-type="float" office:value="10.2048475" calcext:value-type="float">
            <text:p>10.2048475</text:p>
          </table:table-cell>
        </table:table-row>
        <table:table-row table:style-name="ro2">
          <table:table-cell office:value-type="float" office:value="6423" calcext:value-type="float">
            <text:p>6423</text:p>
          </table:table-cell>
          <table:table-cell table:formula="of:=[.A29]/1000" office:value-type="float" office:value="6.423" calcext:value-type="float">
            <text:p>6.4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7/2+)</text:p>
          </table:table-cell>
          <table:table-cell/>
          <table:table-cell table:formula="of:=[.$C$4]+[.$D$4]*[.B29]" office:value-type="float" office:value="-53.74464" calcext:value-type="float">
            <text:p>-53.74464</text:p>
          </table:table-cell>
          <table:table-cell table:formula="of:=[.$C$5]-[.$D$5]*[.B29]" office:value-type="float" office:value="1.28694" calcext:value-type="float">
            <text:p>1.28694</text:p>
          </table:table-cell>
          <table:table-cell table:formula="of:=[.$C$6]-[.B29]" office:value-type="float" office:value="40.777" calcext:value-type="float">
            <text:p>40.777</text:p>
          </table:table-cell>
          <table:table-cell table:formula="of:=[.H29]/4" office:value-type="float" office:value="10.19425" calcext:value-type="float">
            <text:p>10.19425</text:p>
          </table:table-cell>
        </table:table-row>
        <table:table-row table:style-name="ro2">
          <table:table-cell office:value-type="float" office:value="6496.23" calcext:value-type="float">
            <text:p>6496.23</text:p>
          </table:table-cell>
          <table:table-cell table:formula="of:=[.A30]/1000" office:value-type="float" office:value="6.49623" calcext:value-type="float">
            <text:p>6.49623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1/2+ TO 5/2+</text:p>
          </table:table-cell>
          <table:table-cell/>
          <table:table-cell table:formula="of:=[.$C$4]+[.$D$4]*[.B30]" office:value-type="float" office:value="-53.7212064" calcext:value-type="float">
            <text:p>-53.7212064</text:p>
          </table:table-cell>
          <table:table-cell table:formula="of:=[.$C$5]-[.$D$5]*[.B30]" office:value-type="float" office:value="1.2708294" calcext:value-type="float">
            <text:p>1.2708294</text:p>
          </table:table-cell>
          <table:table-cell table:formula="of:=[.$C$6]-[.B30]" office:value-type="float" office:value="40.70377" calcext:value-type="float">
            <text:p>40.70377</text:p>
          </table:table-cell>
          <table:table-cell table:formula="of:=[.H30]/4" office:value-type="float" office:value="10.1759425" calcext:value-type="float">
            <text:p>10.1759425</text:p>
          </table:table-cell>
        </table:table-row>
        <table:table-row table:style-name="ro2">
          <table:table-cell office:value-type="float" office:value="6522" calcext:value-type="float">
            <text:p>6522</text:p>
          </table:table-cell>
          <table:table-cell table:formula="of:=[.A31]/1000" office:value-type="float" office:value="6.522" calcext:value-type="float">
            <text:p>6.5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/2+</text:p>
          </table:table-cell>
          <table:table-cell/>
          <table:table-cell table:formula="of:=[.$C$4]+[.$D$4]*[.B31]" office:value-type="float" office:value="-53.71296" calcext:value-type="float">
            <text:p>-53.71296</text:p>
          </table:table-cell>
          <table:table-cell table:formula="of:=[.$C$5]-[.$D$5]*[.B31]" office:value-type="float" office:value="1.26516" calcext:value-type="float">
            <text:p>1.26516</text:p>
          </table:table-cell>
          <table:table-cell table:formula="of:=[.$C$6]-[.B31]" office:value-type="float" office:value="40.678" calcext:value-type="float">
            <text:p>40.678</text:p>
          </table:table-cell>
          <table:table-cell table:formula="of:=[.H31]/4" office:value-type="float" office:value="10.1695" calcext:value-type="float">
            <text:p>10.1695</text:p>
          </table:table-cell>
        </table:table-row>
        <table:table-row table:style-name="ro2">
          <table:table-cell office:value-type="float" office:value="6615" calcext:value-type="float">
            <text:p>6615</text:p>
          </table:table-cell>
          <table:table-cell table:formula="of:=[.A32]/1000" office:value-type="float" office:value="6.615" calcext:value-type="float">
            <text:p>6.6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9/2+)</text:p>
          </table:table-cell>
          <table:table-cell/>
          <table:table-cell table:formula="of:=[.$C$4]+[.$D$4]*[.B32]" office:value-type="float" office:value="-53.6832" calcext:value-type="float">
            <text:p>-53.6832</text:p>
          </table:table-cell>
          <table:table-cell table:formula="of:=[.$C$5]-[.$D$5]*[.B32]" office:value-type="float" office:value="1.2447" calcext:value-type="float">
            <text:p>1.2447</text:p>
          </table:table-cell>
          <table:table-cell table:formula="of:=[.$C$6]-[.B32]" office:value-type="float" office:value="40.585" calcext:value-type="float">
            <text:p>40.585</text:p>
          </table:table-cell>
          <table:table-cell table:formula="of:=[.H32]/4" office:value-type="float" office:value="10.14625" calcext:value-type="float">
            <text:p>10.14625</text:p>
          </table:table-cell>
        </table:table-row>
        <table:table-row table:style-name="ro2">
          <table:table-cell office:value-type="float" office:value="6695.93" calcext:value-type="float">
            <text:p>6695.93</text:p>
          </table:table-cell>
          <table:table-cell table:formula="of:=[.A33]/1000" office:value-type="float" office:value="6.69593" calcext:value-type="float">
            <text:p>6.69593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1/2+</text:p>
          </table:table-cell>
          <table:table-cell/>
          <table:table-cell table:formula="of:=[.$C$4]+[.$D$4]*[.B33]" office:value-type="float" office:value="-53.6573024" calcext:value-type="float">
            <text:p>-53.6573024</text:p>
          </table:table-cell>
          <table:table-cell table:formula="of:=[.$C$5]-[.$D$5]*[.B33]" office:value-type="float" office:value="1.2268954" calcext:value-type="float">
            <text:p>1.2268954</text:p>
          </table:table-cell>
          <table:table-cell table:formula="of:=[.$C$6]-[.B33]" office:value-type="float" office:value="40.50407" calcext:value-type="float">
            <text:p>40.50407</text:p>
          </table:table-cell>
          <table:table-cell table:formula="of:=[.H33]/4" office:value-type="float" office:value="10.1260175" calcext:value-type="float">
            <text:p>10.1260175</text:p>
          </table:table-cell>
        </table:table-row>
        <table:table-row table:style-name="ro2">
          <table:table-cell office:value-type="float" office:value="6710" calcext:value-type="float">
            <text:p>6710</text:p>
          </table:table-cell>
          <table:table-cell table:formula="of:=[.A34]/1000" office:value-type="float" office:value="6.71" calcext:value-type="float">
            <text:p>6.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5/2+)</text:p>
          </table:table-cell>
          <table:table-cell/>
          <table:table-cell table:formula="of:=[.$C$4]+[.$D$4]*[.B34]" office:value-type="float" office:value="-53.6528" calcext:value-type="float">
            <text:p>-53.6528</text:p>
          </table:table-cell>
          <table:table-cell table:formula="of:=[.$C$5]-[.$D$5]*[.B34]" office:value-type="float" office:value="1.2238" calcext:value-type="float">
            <text:p>1.2238</text:p>
          </table:table-cell>
          <table:table-cell table:formula="of:=[.$C$6]-[.B34]" office:value-type="float" office:value="40.49" calcext:value-type="float">
            <text:p>40.49</text:p>
          </table:table-cell>
          <table:table-cell table:formula="of:=[.H34]/4" office:value-type="float" office:value="10.1225" calcext:value-type="float">
            <text:p>10.1225</text:p>
          </table:table-cell>
        </table:table-row>
        <table:table-row table:style-name="ro2">
          <table:table-cell office:value-type="float" office:value="6712.9" calcext:value-type="float">
            <text:p>6712.9</text:p>
          </table:table-cell>
          <table:table-cell table:formula="of:=[.A35]/1000" office:value-type="float" office:value="6.7129" calcext:value-type="float">
            <text:p>6.7129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(3/2)</text:p>
          </table:table-cell>
          <table:table-cell/>
          <table:table-cell table:formula="of:=[.$C$4]+[.$D$4]*[.B35]" office:value-type="float" office:value="-53.651872" calcext:value-type="float">
            <text:p>-53.651872</text:p>
          </table:table-cell>
          <table:table-cell table:formula="of:=[.$C$5]-[.$D$5]*[.B35]" office:value-type="float" office:value="1.223162" calcext:value-type="float">
            <text:p>1.223162</text:p>
          </table:table-cell>
          <table:table-cell table:formula="of:=[.$C$6]-[.B35]" office:value-type="float" office:value="40.4871" calcext:value-type="float">
            <text:p>40.4871</text:p>
          </table:table-cell>
          <table:table-cell table:formula="of:=[.H35]/4" office:value-type="float" office:value="10.121775" calcext:value-type="float">
            <text:p>10.121775</text:p>
          </table:table-cell>
        </table:table-row>
        <table:table-row table:style-name="ro2">
          <table:table-cell office:value-type="float" office:value="6781.1" calcext:value-type="float">
            <text:p>6781.1</text:p>
          </table:table-cell>
          <table:table-cell table:formula="of:=[.A36]/1000" office:value-type="float" office:value="6.7811" calcext:value-type="float">
            <text:p>6.7811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(11/2-)</text:p>
          </table:table-cell>
          <table:table-cell/>
          <table:table-cell table:formula="of:=[.$C$4]+[.$D$4]*[.B36]" office:value-type="float" office:value="-53.630048" calcext:value-type="float">
            <text:p>-53.630048</text:p>
          </table:table-cell>
          <table:table-cell table:formula="of:=[.$C$5]-[.$D$5]*[.B36]" office:value-type="float" office:value="1.208158" calcext:value-type="float">
            <text:p>1.208158</text:p>
          </table:table-cell>
          <table:table-cell table:formula="of:=[.$C$6]-[.B36]" office:value-type="float" office:value="40.4189" calcext:value-type="float">
            <text:p>40.4189</text:p>
          </table:table-cell>
          <table:table-cell table:formula="of:=[.H36]/4" office:value-type="float" office:value="10.104725" calcext:value-type="float">
            <text:p>10.104725</text:p>
          </table:table-cell>
        </table:table-row>
        <table:table-row table:style-name="ro2">
          <table:table-cell office:value-type="float" office:value="6908.52" calcext:value-type="float">
            <text:p>6908.52</text:p>
          </table:table-cell>
          <table:table-cell table:formula="of:=[.A37]/1000" office:value-type="float" office:value="6.90852" calcext:value-type="float">
            <text:p>6.90852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(1/2+ 3/2)</text:p>
          </table:table-cell>
          <table:table-cell/>
          <table:table-cell table:formula="of:=[.$C$4]+[.$D$4]*[.B37]" office:value-type="float" office:value="-53.5892736" calcext:value-type="float">
            <text:p>-53.5892736</text:p>
          </table:table-cell>
          <table:table-cell table:formula="of:=[.$C$5]-[.$D$5]*[.B37]" office:value-type="float" office:value="1.1801256" calcext:value-type="float">
            <text:p>1.1801256</text:p>
          </table:table-cell>
          <table:table-cell table:formula="of:=[.$C$6]-[.B37]" office:value-type="float" office:value="40.29148" calcext:value-type="float">
            <text:p>40.29148</text:p>
          </table:table-cell>
          <table:table-cell table:formula="of:=[.H37]/4" office:value-type="float" office:value="10.07287" calcext:value-type="float">
            <text:p>10.07287</text:p>
          </table:table-cell>
        </table:table-row>
        <table:table-row table:style-name="ro2">
          <table:table-cell office:value-type="float" office:value="6921" calcext:value-type="float">
            <text:p>6921</text:p>
          </table:table-cell>
          <table:table-cell table:formula="of:=[.A38]/1000" office:value-type="float" office:value="6.921" calcext:value-type="float">
            <text:p>6.9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7/2+)</text:p>
          </table:table-cell>
          <table:table-cell/>
          <table:table-cell table:formula="of:=[.$C$4]+[.$D$4]*[.B38]" office:value-type="float" office:value="-53.58528" calcext:value-type="float">
            <text:p>-53.58528</text:p>
          </table:table-cell>
          <table:table-cell table:formula="of:=[.$C$5]-[.$D$5]*[.B38]" office:value-type="float" office:value="1.17738" calcext:value-type="float">
            <text:p>1.17738</text:p>
          </table:table-cell>
          <table:table-cell table:formula="of:=[.$C$6]-[.B38]" office:value-type="float" office:value="40.279" calcext:value-type="float">
            <text:p>40.279</text:p>
          </table:table-cell>
          <table:table-cell table:formula="of:=[.H38]/4" office:value-type="float" office:value="10.06975" calcext:value-type="float">
            <text:p>10.06975</text:p>
          </table:table-cell>
        </table:table-row>
        <table:table-row table:style-name="ro2">
          <table:table-cell office:value-type="float" office:value="7014" calcext:value-type="float">
            <text:p>7014</text:p>
          </table:table-cell>
          <table:table-cell table:formula="of:=[.A39]/1000" office:value-type="float" office:value="7.014" calcext:value-type="float">
            <text:p>7.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5/2- 7/2-)</text:p>
          </table:table-cell>
          <table:table-cell/>
          <table:table-cell table:formula="of:=[.$C$4]+[.$D$4]*[.B39]" office:value-type="float" office:value="-53.55552" calcext:value-type="float">
            <text:p>-53.55552</text:p>
          </table:table-cell>
          <table:table-cell table:formula="of:=[.$C$5]-[.$D$5]*[.B39]" office:value-type="float" office:value="1.15692" calcext:value-type="float">
            <text:p>1.15692</text:p>
          </table:table-cell>
          <table:table-cell table:formula="of:=[.$C$6]-[.B39]" office:value-type="float" office:value="40.186" calcext:value-type="float">
            <text:p>40.186</text:p>
          </table:table-cell>
          <table:table-cell table:formula="of:=[.H39]/4" office:value-type="float" office:value="10.0465" calcext:value-type="float">
            <text:p>10.0465</text:p>
          </table:table-cell>
        </table:table-row>
        <table:table-row table:style-name="ro2">
          <table:table-cell office:value-type="float" office:value="7058" calcext:value-type="float">
            <text:p>7058</text:p>
          </table:table-cell>
          <table:table-cell table:formula="of:=[.A40]/1000" office:value-type="float" office:value="7.058" calcext:value-type="float">
            <text:p>7.058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1/2+</text:p>
          </table:table-cell>
          <table:table-cell/>
          <table:table-cell table:formula="of:=[.$C$4]+[.$D$4]*[.B40]" office:value-type="float" office:value="-53.54144" calcext:value-type="float">
            <text:p>-53.54144</text:p>
          </table:table-cell>
          <table:table-cell table:formula="of:=[.$C$5]-[.$D$5]*[.B40]" office:value-type="float" office:value="1.14724" calcext:value-type="float">
            <text:p>1.14724</text:p>
          </table:table-cell>
          <table:table-cell table:formula="of:=[.$C$6]-[.B40]" office:value-type="float" office:value="40.142" calcext:value-type="float">
            <text:p>40.142</text:p>
          </table:table-cell>
          <table:table-cell table:formula="of:=[.H40]/4" office:value-type="float" office:value="10.0355" calcext:value-type="float">
            <text:p>10.0355</text:p>
          </table:table-cell>
        </table:table-row>
        <table:table-row table:style-name="ro2">
          <table:table-cell office:value-type="float" office:value="7072" calcext:value-type="float">
            <text:p>7072</text:p>
          </table:table-cell>
          <table:table-cell table:formula="of:=[.A41]/1000" office:value-type="float" office:value="7.072" calcext:value-type="float">
            <text:p>7.0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3/2+ 5/2+)</text:p>
          </table:table-cell>
          <table:table-cell/>
          <table:table-cell table:formula="of:=[.$C$4]+[.$D$4]*[.B41]" office:value-type="float" office:value="-53.53696" calcext:value-type="float">
            <text:p>-53.53696</text:p>
          </table:table-cell>
          <table:table-cell table:formula="of:=[.$C$5]-[.$D$5]*[.B41]" office:value-type="float" office:value="1.14416" calcext:value-type="float">
            <text:p>1.14416</text:p>
          </table:table-cell>
          <table:table-cell table:formula="of:=[.$C$6]-[.B41]" office:value-type="float" office:value="40.128" calcext:value-type="float">
            <text:p>40.128</text:p>
          </table:table-cell>
          <table:table-cell table:formula="of:=[.H41]/4" office:value-type="float" office:value="10.032" calcext:value-type="float">
            <text:p>10.032</text:p>
          </table:table-cell>
        </table:table-row>
        <table:table-row table:style-name="ro2">
          <table:table-cell office:value-type="float" office:value="7139" calcext:value-type="float">
            <text:p>7139</text:p>
          </table:table-cell>
          <table:table-cell table:formula="of:=[.A42]/1000" office:value-type="float" office:value="7.139" calcext:value-type="float">
            <text:p>7.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1/2+)</text:p>
          </table:table-cell>
          <table:table-cell/>
          <table:table-cell table:formula="of:=[.$C$4]+[.$D$4]*[.B42]" office:value-type="float" office:value="-53.51552" calcext:value-type="float">
            <text:p>-53.51552</text:p>
          </table:table-cell>
          <table:table-cell table:formula="of:=[.$C$5]-[.$D$5]*[.B42]" office:value-type="float" office:value="1.12942" calcext:value-type="float">
            <text:p>1.12942</text:p>
          </table:table-cell>
          <table:table-cell table:formula="of:=[.$C$6]-[.B42]" office:value-type="float" office:value="40.061" calcext:value-type="float">
            <text:p>40.061</text:p>
          </table:table-cell>
          <table:table-cell table:formula="of:=[.H42]/4" office:value-type="float" office:value="10.01525" calcext:value-type="float">
            <text:p>10.01525</text:p>
          </table:table-cell>
        </table:table-row>
        <table:table-row table:style-name="ro2">
          <table:table-cell office:value-type="float" office:value="7181.8" calcext:value-type="float">
            <text:p>7181.8</text:p>
          </table:table-cell>
          <table:table-cell table:formula="of:=[.A43]/1000" office:value-type="float" office:value="7.1818" calcext:value-type="float">
            <text:p>7.181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(3/2)</text:p>
          </table:table-cell>
          <table:table-cell/>
          <table:table-cell table:formula="of:=[.$C$4]+[.$D$4]*[.B43]" office:value-type="float" office:value="-53.501824" calcext:value-type="float">
            <text:p>-53.501824</text:p>
          </table:table-cell>
          <table:table-cell table:formula="of:=[.$C$5]-[.$D$5]*[.B43]" office:value-type="float" office:value="1.120004" calcext:value-type="float">
            <text:p>1.120004</text:p>
          </table:table-cell>
          <table:table-cell table:formula="of:=[.$C$6]-[.B43]" office:value-type="float" office:value="40.0182" calcext:value-type="float">
            <text:p>40.0182</text:p>
          </table:table-cell>
          <table:table-cell table:formula="of:=[.H43]/4" office:value-type="float" office:value="10.00455" calcext:value-type="float">
            <text:p>10.00455</text:p>
          </table:table-cell>
        </table:table-row>
        <table:table-row table:style-name="ro2">
          <table:table-cell office:value-type="float" office:value="7197" calcext:value-type="float">
            <text:p>7197</text:p>
          </table:table-cell>
          <table:table-cell table:formula="of:=[.A44]/1000" office:value-type="float" office:value="7.197" calcext:value-type="float">
            <text:p>7.1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3/2 5/2)</text:p>
          </table:table-cell>
          <table:table-cell/>
          <table:table-cell table:formula="of:=[.$C$4]+[.$D$4]*[.B44]" office:value-type="float" office:value="-53.49696" calcext:value-type="float">
            <text:p>-53.49696</text:p>
          </table:table-cell>
          <table:table-cell table:formula="of:=[.$C$5]-[.$D$5]*[.B44]" office:value-type="float" office:value="1.11666" calcext:value-type="float">
            <text:p>1.11666</text:p>
          </table:table-cell>
          <table:table-cell table:formula="of:=[.$C$6]-[.B44]" office:value-type="float" office:value="40.003" calcext:value-type="float">
            <text:p>40.003</text:p>
          </table:table-cell>
          <table:table-cell table:formula="of:=[.H44]/4" office:value-type="float" office:value="10.00075" calcext:value-type="float">
            <text:p>10.00075</text:p>
          </table:table-cell>
        </table:table-row>
        <table:table-row table:style-name="ro2">
          <table:table-cell office:value-type="float" office:value="7523.19" calcext:value-type="float">
            <text:p>7523.19</text:p>
          </table:table-cell>
          <table:table-cell table:formula="of:=[.A45]/1000" office:value-type="float" office:value="7.52319" calcext:value-type="float">
            <text:p>7.52319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(1/2 3/2)</text:p>
          </table:table-cell>
          <table:table-cell/>
          <table:table-cell table:formula="of:=[.$C$4]+[.$D$4]*[.B45]" office:value-type="float" office:value="-53.3925792" calcext:value-type="float">
            <text:p>-53.3925792</text:p>
          </table:table-cell>
          <table:table-cell table:formula="of:=[.$C$5]-[.$D$5]*[.B45]" office:value-type="float" office:value="1.0448982" calcext:value-type="float">
            <text:p>1.0448982</text:p>
          </table:table-cell>
          <table:table-cell table:formula="of:=[.$C$6]-[.B45]" office:value-type="float" office:value="39.67681" calcext:value-type="float">
            <text:p>39.67681</text:p>
          </table:table-cell>
          <table:table-cell table:formula="of:=[.H45]/4" office:value-type="float" office:value="9.9192025" calcext:value-type="float">
            <text:p>9.9192025</text:p>
          </table:table-cell>
        </table:table-row>
        <table:table-row table:style-name="ro2">
          <table:table-cell office:value-type="float" office:value="7622.1" calcext:value-type="float">
            <text:p>7622.1</text:p>
          </table:table-cell>
          <table:table-cell table:formula="of:=[.A46]/1000" office:value-type="float" office:value="7.6221" calcext:value-type="float">
            <text:p>7.6221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(5/2- 7/2-)</text:p>
          </table:table-cell>
          <table:table-cell/>
          <table:table-cell table:formula="of:=[.$C$4]+[.$D$4]*[.B46]" office:value-type="float" office:value="-53.360928" calcext:value-type="float">
            <text:p>-53.360928</text:p>
          </table:table-cell>
          <table:table-cell table:formula="of:=[.$C$5]-[.$D$5]*[.B46]" office:value-type="float" office:value="1.023138" calcext:value-type="float">
            <text:p>1.023138</text:p>
          </table:table-cell>
          <table:table-cell table:formula="of:=[.$C$6]-[.B46]" office:value-type="float" office:value="39.5779" calcext:value-type="float">
            <text:p>39.5779</text:p>
          </table:table-cell>
          <table:table-cell table:formula="of:=[.H46]/4" office:value-type="float" office:value="9.894475" calcext:value-type="float">
            <text:p>9.894475</text:p>
          </table:table-cell>
        </table:table-row>
        <table:table-row table:style-name="ro2">
          <table:table-cell office:value-type="float" office:value="7692" calcext:value-type="float">
            <text:p>7692</text:p>
          </table:table-cell>
          <table:table-cell table:formula="of:=[.A47]/1000" office:value-type="float" office:value="7.692" calcext:value-type="float">
            <text:p>7.692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(1/2+ 3/2+)</text:p>
          </table:table-cell>
          <table:table-cell/>
          <table:table-cell table:formula="of:=[.$C$4]+[.$D$4]*[.B47]" office:value-type="float" office:value="-53.33856" calcext:value-type="float">
            <text:p>-53.33856</text:p>
          </table:table-cell>
          <table:table-cell table:formula="of:=[.$C$5]-[.$D$5]*[.B47]" office:value-type="float" office:value="1.00776" calcext:value-type="float">
            <text:p>1.00776</text:p>
          </table:table-cell>
          <table:table-cell table:formula="of:=[.$C$6]-[.B47]" office:value-type="float" office:value="39.508" calcext:value-type="float">
            <text:p>39.508</text:p>
          </table:table-cell>
          <table:table-cell table:formula="of:=[.H47]/4" office:value-type="float" office:value="9.877" calcext:value-type="float">
            <text:p>9.877</text:p>
          </table:table-cell>
        </table:table-row>
        <table:table-row table:style-name="ro2">
          <table:table-cell office:value-type="float" office:value="7767" calcext:value-type="float">
            <text:p>7767</text:p>
          </table:table-cell>
          <table:table-cell table:formula="of:=[.A48]/1000" office:value-type="float" office:value="7.767" calcext:value-type="float">
            <text:p>7.7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3/2 5/2)</text:p>
          </table:table-cell>
          <table:table-cell/>
          <table:table-cell table:formula="of:=[.$C$4]+[.$D$4]*[.B48]" office:value-type="float" office:value="-53.31456" calcext:value-type="float">
            <text:p>-53.31456</text:p>
          </table:table-cell>
          <table:table-cell table:formula="of:=[.$C$5]-[.$D$5]*[.B48]" office:value-type="float" office:value="0.99126" calcext:value-type="float">
            <text:p>0.99126</text:p>
          </table:table-cell>
          <table:table-cell table:formula="of:=[.$C$6]-[.B48]" office:value-type="float" office:value="39.433" calcext:value-type="float">
            <text:p>39.433</text:p>
          </table:table-cell>
          <table:table-cell table:formula="of:=[.H48]/4" office:value-type="float" office:value="9.85825" calcext:value-type="float">
            <text:p>9.85825</text:p>
          </table:table-cell>
        </table:table-row>
        <table:table-row table:style-name="ro2">
          <table:table-cell office:value-type="float" office:value="7787" calcext:value-type="float">
            <text:p>7787</text:p>
          </table:table-cell>
          <table:table-cell table:formula="of:=[.A49]/1000" office:value-type="float" office:value="7.787" calcext:value-type="float">
            <text:p>7.7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7/2+)</text:p>
          </table:table-cell>
          <table:table-cell/>
          <table:table-cell table:formula="of:=[.$C$4]+[.$D$4]*[.B49]" office:value-type="float" office:value="-53.30816" calcext:value-type="float">
            <text:p>-53.30816</text:p>
          </table:table-cell>
          <table:table-cell table:formula="of:=[.$C$5]-[.$D$5]*[.B49]" office:value-type="float" office:value="0.98686" calcext:value-type="float">
            <text:p>0.98686</text:p>
          </table:table-cell>
          <table:table-cell table:formula="of:=[.$C$6]-[.B49]" office:value-type="float" office:value="39.413" calcext:value-type="float">
            <text:p>39.413</text:p>
          </table:table-cell>
          <table:table-cell table:formula="of:=[.H49]/4" office:value-type="float" office:value="9.85325" calcext:value-type="float">
            <text:p>9.85325</text:p>
          </table:table-cell>
        </table:table-row>
        <table:table-row table:style-name="ro2">
          <table:table-cell office:value-type="float" office:value="7892" calcext:value-type="float">
            <text:p>7892</text:p>
          </table:table-cell>
          <table:table-cell table:formula="of:=[.A50]/1000" office:value-type="float" office:value="7.892" calcext:value-type="float">
            <text:p>7.89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C$4]+[.$D$4]*[.B50]" office:value-type="float" office:value="-53.27456" calcext:value-type="float">
            <text:p>-53.27456</text:p>
          </table:table-cell>
          <table:table-cell table:formula="of:=[.$C$5]-[.$D$5]*[.B50]" office:value-type="float" office:value="0.96376" calcext:value-type="float">
            <text:p>0.96376</text:p>
          </table:table-cell>
          <table:table-cell table:formula="of:=[.$C$6]-[.B50]" office:value-type="float" office:value="39.308" calcext:value-type="float">
            <text:p>39.308</text:p>
          </table:table-cell>
          <table:table-cell table:formula="of:=[.H50]/4" office:value-type="float" office:value="9.827" calcext:value-type="float">
            <text:p>9.827</text:p>
          </table:table-cell>
        </table:table-row>
        <table:table-row table:style-name="ro2">
          <table:table-cell office:value-type="float" office:value="7987" calcext:value-type="float">
            <text:p>7987</text:p>
          </table:table-cell>
          <table:table-cell table:formula="of:=[.A51]/1000" office:value-type="float" office:value="7.987" calcext:value-type="float">
            <text:p>7.9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9/2)</text:p>
          </table:table-cell>
          <table:table-cell/>
          <table:table-cell table:formula="of:=[.$C$4]+[.$D$4]*[.B51]" office:value-type="float" office:value="-53.24416" calcext:value-type="float">
            <text:p>-53.24416</text:p>
          </table:table-cell>
          <table:table-cell table:formula="of:=[.$C$5]-[.$D$5]*[.B51]" office:value-type="float" office:value="0.94286" calcext:value-type="float">
            <text:p>0.94286</text:p>
          </table:table-cell>
          <table:table-cell table:formula="of:=[.$C$6]-[.B51]" office:value-type="float" office:value="39.213" calcext:value-type="float">
            <text:p>39.213</text:p>
          </table:table-cell>
          <table:table-cell table:formula="of:=[.H51]/4" office:value-type="float" office:value="9.80325" calcext:value-type="float">
            <text:p>9.80325</text:p>
          </table:table-cell>
        </table:table-row>
        <table:table-row table:style-name="ro2">
          <table:table-cell office:value-type="float" office:value="7996.8" calcext:value-type="float">
            <text:p>7996.8</text:p>
          </table:table-cell>
          <table:table-cell table:formula="of:=[.A52]/1000" office:value-type="float" office:value="7.9968" calcext:value-type="float">
            <text:p>7.9968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(3/2-)</text:p>
          </table:table-cell>
          <table:table-cell/>
          <table:table-cell table:formula="of:=[.$C$4]+[.$D$4]*[.B52]" office:value-type="float" office:value="-53.241024" calcext:value-type="float">
            <text:p>-53.241024</text:p>
          </table:table-cell>
          <table:table-cell table:formula="of:=[.$C$5]-[.$D$5]*[.B52]" office:value-type="float" office:value="0.940704" calcext:value-type="float">
            <text:p>0.940704</text:p>
          </table:table-cell>
          <table:table-cell table:formula="of:=[.$C$6]-[.B52]" office:value-type="float" office:value="39.2032" calcext:value-type="float">
            <text:p>39.2032</text:p>
          </table:table-cell>
          <table:table-cell table:formula="of:=[.H52]/4" office:value-type="float" office:value="9.8008" calcext:value-type="float">
            <text:p>9.8008</text:p>
          </table:table-cell>
        </table:table-row>
        <table:table-row table:style-name="ro2">
          <table:table-cell office:value-type="float" office:value="8138" calcext:value-type="float">
            <text:p>8138</text:p>
          </table:table-cell>
          <table:table-cell table:formula="of:=[.A53]/1000" office:value-type="float" office:value="8.138" calcext:value-type="float">
            <text:p>8.13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C$4]+[.$D$4]*[.B53]" office:value-type="float" office:value="-53.19584" calcext:value-type="float">
            <text:p>-53.19584</text:p>
          </table:table-cell>
          <table:table-cell table:formula="of:=[.$C$5]-[.$D$5]*[.B53]" office:value-type="float" office:value="0.90964" calcext:value-type="float">
            <text:p>0.90964</text:p>
          </table:table-cell>
          <table:table-cell table:formula="of:=[.$C$6]-[.B53]" office:value-type="float" office:value="39.062" calcext:value-type="float">
            <text:p>39.062</text:p>
          </table:table-cell>
          <table:table-cell table:formula="of:=[.H53]/4" office:value-type="float" office:value="9.7655" calcext:value-type="float">
            <text:p>9.7655</text:p>
          </table:table-cell>
        </table:table-row>
        <table:table-row table:style-name="ro2">
          <table:table-cell office:value-type="float" office:value="8161" calcext:value-type="float">
            <text:p>8161</text:p>
          </table:table-cell>
          <table:table-cell table:formula="of:=[.A54]/1000" office:value-type="float" office:value="8.161" calcext:value-type="float">
            <text:p>8.16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C$4]+[.$D$4]*[.B54]" office:value-type="float" office:value="-53.18848" calcext:value-type="float">
            <text:p>-53.18848</text:p>
          </table:table-cell>
          <table:table-cell table:formula="of:=[.$C$5]-[.$D$5]*[.B54]" office:value-type="float" office:value="0.90458" calcext:value-type="float">
            <text:p>0.90458</text:p>
          </table:table-cell>
          <table:table-cell table:formula="of:=[.$C$6]-[.B54]" office:value-type="float" office:value="39.039" calcext:value-type="float">
            <text:p>39.039</text:p>
          </table:table-cell>
          <table:table-cell table:formula="of:=[.H54]/4" office:value-type="float" office:value="9.75975" calcext:value-type="float">
            <text:p>9.75975</text:p>
          </table:table-cell>
        </table:table-row>
        <table:table-row table:style-name="ro2">
          <table:table-cell office:value-type="float" office:value="8173" calcext:value-type="float">
            <text:p>8173</text:p>
          </table:table-cell>
          <table:table-cell table:formula="of:=[.A55]/1000" office:value-type="float" office:value="8.173" calcext:value-type="float">
            <text:p>8.1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1/2+)</text:p>
          </table:table-cell>
          <table:table-cell/>
          <table:table-cell table:formula="of:=[.$C$4]+[.$D$4]*[.B55]" office:value-type="float" office:value="-53.18464" calcext:value-type="float">
            <text:p>-53.18464</text:p>
          </table:table-cell>
          <table:table-cell table:formula="of:=[.$C$5]-[.$D$5]*[.B55]" office:value-type="float" office:value="0.90194" calcext:value-type="float">
            <text:p>0.90194</text:p>
          </table:table-cell>
          <table:table-cell table:formula="of:=[.$C$6]-[.B55]" office:value-type="float" office:value="39.027" calcext:value-type="float">
            <text:p>39.027</text:p>
          </table:table-cell>
          <table:table-cell table:formula="of:=[.H55]/4" office:value-type="float" office:value="9.75675" calcext:value-type="float">
            <text:p>9.75675</text:p>
          </table:table-cell>
        </table:table-row>
        <table:table-row table:style-name="ro2">
          <table:table-cell office:value-type="float" office:value="8209" calcext:value-type="float">
            <text:p>8209</text:p>
          </table:table-cell>
          <table:table-cell table:formula="of:=[.A56]/1000" office:value-type="float" office:value="8.209" calcext:value-type="float">
            <text:p>8.2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3/2+)</text:p>
          </table:table-cell>
          <table:table-cell/>
          <table:table-cell table:formula="of:=[.$C$4]+[.$D$4]*[.B56]" office:value-type="float" office:value="-53.17312" calcext:value-type="float">
            <text:p>-53.17312</text:p>
          </table:table-cell>
          <table:table-cell table:formula="of:=[.$C$5]-[.$D$5]*[.B56]" office:value-type="float" office:value="0.89402" calcext:value-type="float">
            <text:p>0.89402</text:p>
          </table:table-cell>
          <table:table-cell table:formula="of:=[.$C$6]-[.B56]" office:value-type="float" office:value="38.991" calcext:value-type="float">
            <text:p>38.991</text:p>
          </table:table-cell>
          <table:table-cell table:formula="of:=[.H56]/4" office:value-type="float" office:value="9.74775" calcext:value-type="float">
            <text:p>9.74775</text:p>
          </table:table-cell>
        </table:table-row>
        <table:table-row table:style-name="ro2">
          <table:table-cell office:value-type="float" office:value="8270" calcext:value-type="float">
            <text:p>8270</text:p>
          </table:table-cell>
          <table:table-cell table:formula="of:=[.A57]/1000" office:value-type="float" office:value="8.27" calcext:value-type="float">
            <text:p>8.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5/2- 7/2-)</text:p>
          </table:table-cell>
          <table:table-cell/>
          <table:table-cell table:formula="of:=[.$C$4]+[.$D$4]*[.B57]" office:value-type="float" office:value="-53.1536" calcext:value-type="float">
            <text:p>-53.1536</text:p>
          </table:table-cell>
          <table:table-cell table:formula="of:=[.$C$5]-[.$D$5]*[.B57]" office:value-type="float" office:value="0.8806" calcext:value-type="float">
            <text:p>0.8806</text:p>
          </table:table-cell>
          <table:table-cell table:formula="of:=[.$C$6]-[.B57]" office:value-type="float" office:value="38.93" calcext:value-type="float">
            <text:p>38.93</text:p>
          </table:table-cell>
          <table:table-cell table:formula="of:=[.H57]/4" office:value-type="float" office:value="9.7325" calcext:value-type="float">
            <text:p>9.7325</text:p>
          </table:table-cell>
        </table:table-row>
        <table:table-row table:style-name="ro2">
          <table:table-cell office:value-type="float" office:value="8290" calcext:value-type="float">
            <text:p>8290</text:p>
          </table:table-cell>
          <table:table-cell table:formula="of:=[.A58]/1000" office:value-type="float" office:value="8.29" calcext:value-type="float">
            <text:p>8.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/2+</text:p>
          </table:table-cell>
          <table:table-cell/>
          <table:table-cell table:formula="of:=[.$C$4]+[.$D$4]*[.B58]" office:value-type="float" office:value="-53.1472" calcext:value-type="float">
            <text:p>-53.1472</text:p>
          </table:table-cell>
          <table:table-cell table:formula="of:=[.$C$5]-[.$D$5]*[.B58]" office:value-type="float" office:value="0.8762" calcext:value-type="float">
            <text:p>0.8762</text:p>
          </table:table-cell>
          <table:table-cell table:formula="of:=[.$C$6]-[.B58]" office:value-type="float" office:value="38.91" calcext:value-type="float">
            <text:p>38.91</text:p>
          </table:table-cell>
          <table:table-cell table:formula="of:=[.H58]/4" office:value-type="float" office:value="9.7275" calcext:value-type="float">
            <text:p>9.7275</text:p>
          </table:table-cell>
        </table:table-row>
        <table:table-row table:style-name="ro2">
          <table:table-cell office:value-type="float" office:value="8331" calcext:value-type="float">
            <text:p>8331</text:p>
          </table:table-cell>
          <table:table-cell table:formula="of:=[.A59]/1000" office:value-type="float" office:value="8.331" calcext:value-type="float">
            <text:p>8.331</text:p>
          </table:table-cell>
          <table:table-cell office:value-type="float" office:value="0.6" calcext:value-type="float">
            <text:p>0.6</text:p>
          </table:table-cell>
          <table:table-cell table:number-columns-repeated="2"/>
          <table:table-cell table:formula="of:=[.$C$4]+[.$D$4]*[.B59]" office:value-type="float" office:value="-53.13408" calcext:value-type="float">
            <text:p>-53.13408</text:p>
          </table:table-cell>
          <table:table-cell table:formula="of:=[.$C$5]-[.$D$5]*[.B59]" office:value-type="float" office:value="0.86718" calcext:value-type="float">
            <text:p>0.86718</text:p>
          </table:table-cell>
          <table:table-cell table:formula="of:=[.$C$6]-[.B59]" office:value-type="float" office:value="38.869" calcext:value-type="float">
            <text:p>38.869</text:p>
          </table:table-cell>
          <table:table-cell table:formula="of:=[.H59]/4" office:value-type="float" office:value="9.71725" calcext:value-type="float">
            <text:p>9.71725</text:p>
          </table:table-cell>
        </table:table-row>
        <table:table-row table:style-name="ro2">
          <table:table-cell office:value-type="float" office:value="8349" calcext:value-type="float">
            <text:p>8349</text:p>
          </table:table-cell>
          <table:table-cell table:formula="of:=[.A60]/1000" office:value-type="float" office:value="8.349" calcext:value-type="float">
            <text:p>8.34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C$4]+[.$D$4]*[.B60]" office:value-type="float" office:value="-53.12832" calcext:value-type="float">
            <text:p>-53.12832</text:p>
          </table:table-cell>
          <table:table-cell table:formula="of:=[.$C$5]-[.$D$5]*[.B60]" office:value-type="float" office:value="0.86322" calcext:value-type="float">
            <text:p>0.86322</text:p>
          </table:table-cell>
          <table:table-cell table:formula="of:=[.$C$6]-[.B60]" office:value-type="float" office:value="38.851" calcext:value-type="float">
            <text:p>38.851</text:p>
          </table:table-cell>
          <table:table-cell table:formula="of:=[.H60]/4" office:value-type="float" office:value="9.71275" calcext:value-type="float">
            <text:p>9.71275</text:p>
          </table:table-cell>
        </table:table-row>
        <table:table-row table:style-name="ro2">
          <table:table-cell office:value-type="float" office:value="8371" calcext:value-type="float">
            <text:p>8371</text:p>
          </table:table-cell>
          <table:table-cell table:formula="of:=[.A61]/1000" office:value-type="float" office:value="8.371" calcext:value-type="float">
            <text:p>8.37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C$4]+[.$D$4]*[.B61]" office:value-type="float" office:value="-53.12128" calcext:value-type="float">
            <text:p>-53.12128</text:p>
          </table:table-cell>
          <table:table-cell table:formula="of:=[.$C$5]-[.$D$5]*[.B61]" office:value-type="float" office:value="0.85838" calcext:value-type="float">
            <text:p>0.85838</text:p>
          </table:table-cell>
          <table:table-cell table:formula="of:=[.$C$6]-[.B61]" office:value-type="float" office:value="38.829" calcext:value-type="float">
            <text:p>38.829</text:p>
          </table:table-cell>
          <table:table-cell table:formula="of:=[.H61]/4" office:value-type="float" office:value="9.70725" calcext:value-type="float">
            <text:p>9.70725</text:p>
          </table:table-cell>
        </table:table-row>
        <table:table-row table:style-name="ro2">
          <table:table-cell office:value-type="float" office:value="8418" calcext:value-type="float">
            <text:p>8418</text:p>
          </table:table-cell>
          <table:table-cell table:formula="of:=[.A62]/1000" office:value-type="float" office:value="8.418" calcext:value-type="float">
            <text:p>8.4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3/2)</text:p>
          </table:table-cell>
          <table:table-cell/>
          <table:table-cell table:formula="of:=[.$C$4]+[.$D$4]*[.B62]" office:value-type="float" office:value="-53.10624" calcext:value-type="float">
            <text:p>-53.10624</text:p>
          </table:table-cell>
          <table:table-cell table:formula="of:=[.$C$5]-[.$D$5]*[.B62]" office:value-type="float" office:value="0.84804" calcext:value-type="float">
            <text:p>0.84804</text:p>
          </table:table-cell>
          <table:table-cell table:formula="of:=[.$C$6]-[.B62]" office:value-type="float" office:value="38.782" calcext:value-type="float">
            <text:p>38.782</text:p>
          </table:table-cell>
          <table:table-cell table:formula="of:=[.H62]/4" office:value-type="float" office:value="9.6955" calcext:value-type="float">
            <text:p>9.6955</text:p>
          </table:table-cell>
        </table:table-row>
        <table:table-row table:style-name="ro2">
          <table:table-cell office:value-type="float" office:value="8476" calcext:value-type="float">
            <text:p>8476</text:p>
          </table:table-cell>
          <table:table-cell table:formula="of:=[.A63]/1000" office:value-type="float" office:value="8.476" calcext:value-type="float">
            <text:p>8.47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C$4]+[.$D$4]*[.B63]" office:value-type="float" office:value="-53.08768" calcext:value-type="float">
            <text:p>-53.08768</text:p>
          </table:table-cell>
          <table:table-cell table:formula="of:=[.$C$5]-[.$D$5]*[.B63]" office:value-type="float" office:value="0.83528" calcext:value-type="float">
            <text:p>0.83528</text:p>
          </table:table-cell>
          <table:table-cell table:formula="of:=[.$C$6]-[.B63]" office:value-type="float" office:value="38.724" calcext:value-type="float">
            <text:p>38.724</text:p>
          </table:table-cell>
          <table:table-cell table:formula="of:=[.H63]/4" office:value-type="float" office:value="9.681" calcext:value-type="float">
            <text:p>9.681</text:p>
          </table:table-cell>
        </table:table-row>
        <table:table-row table:style-name="ro2">
          <table:table-cell office:value-type="float" office:value="8507.5" calcext:value-type="float">
            <text:p>8507.5</text:p>
          </table:table-cell>
          <table:table-cell table:formula="of:=[.A64]/1000" office:value-type="float" office:value="8.5075" calcext:value-type="float">
            <text:p>8.5075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(3/2+ 5/2+)</text:p>
          </table:table-cell>
          <table:table-cell/>
          <table:table-cell table:formula="of:=[.$C$4]+[.$D$4]*[.B64]" office:value-type="float" office:value="-53.0776" calcext:value-type="float">
            <text:p>-53.0776</text:p>
          </table:table-cell>
          <table:table-cell table:formula="of:=[.$C$5]-[.$D$5]*[.B64]" office:value-type="float" office:value="0.82835" calcext:value-type="float">
            <text:p>0.82835</text:p>
          </table:table-cell>
          <table:table-cell table:formula="of:=[.$C$6]-[.B64]" office:value-type="float" office:value="38.6925" calcext:value-type="float">
            <text:p>38.6925</text:p>
          </table:table-cell>
          <table:table-cell table:formula="of:=[.H64]/4" office:value-type="float" office:value="9.673125" calcext:value-type="float">
            <text:p>9.673125</text:p>
          </table:table-cell>
        </table:table-row>
        <table:table-row table:style-name="ro2">
          <table:table-cell office:value-type="float" office:value="8529.2" calcext:value-type="float">
            <text:p>8529.2</text:p>
          </table:table-cell>
          <table:table-cell table:formula="of:=[.A65]/1000" office:value-type="float" office:value="8.5292" calcext:value-type="float">
            <text:p>8.5292</text:p>
          </table:table-cell>
          <table:table-cell office:value-type="float" office:value="1.7" calcext:value-type="float">
            <text:p>1.7</text:p>
          </table:table-cell>
          <table:table-cell table:number-columns-repeated="2"/>
          <table:table-cell table:formula="of:=[.$C$4]+[.$D$4]*[.B65]" office:value-type="float" office:value="-53.070656" calcext:value-type="float">
            <text:p>-53.070656</text:p>
          </table:table-cell>
          <table:table-cell table:formula="of:=[.$C$5]-[.$D$5]*[.B65]" office:value-type="float" office:value="0.823576" calcext:value-type="float">
            <text:p>0.823576</text:p>
          </table:table-cell>
          <table:table-cell table:formula="of:=[.$C$6]-[.B65]" office:value-type="float" office:value="38.6708" calcext:value-type="float">
            <text:p>38.6708</text:p>
          </table:table-cell>
          <table:table-cell table:formula="of:=[.H65]/4" office:value-type="float" office:value="9.6677" calcext:value-type="float">
            <text:p>9.6677</text:p>
          </table:table-cell>
        </table:table-row>
        <table:table-row table:style-name="ro2">
          <table:table-cell office:value-type="float" office:value="8541.3" calcext:value-type="float">
            <text:p>8541.3</text:p>
          </table:table-cell>
          <table:table-cell table:formula="of:=[.A66]/1000" office:value-type="float" office:value="8.5413" calcext:value-type="float">
            <text:p>8.54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C$4]+[.$D$4]*[.B66]" office:value-type="float" office:value="-53.066784" calcext:value-type="float">
            <text:p>-53.066784</text:p>
          </table:table-cell>
          <table:table-cell table:formula="of:=[.$C$5]-[.$D$5]*[.B66]" office:value-type="float" office:value="0.820914" calcext:value-type="float">
            <text:p>0.820914</text:p>
          </table:table-cell>
          <table:table-cell table:formula="of:=[.$C$6]-[.B66]" office:value-type="float" office:value="38.6587" calcext:value-type="float">
            <text:p>38.6587</text:p>
          </table:table-cell>
          <table:table-cell table:formula="of:=[.H66]/4" office:value-type="float" office:value="9.664675" calcext:value-type="float">
            <text:p>9.664675</text:p>
          </table:table-cell>
        </table:table-row>
        <table:table-row table:style-name="ro2">
          <table:table-cell office:value-type="float" office:value="8557.8" calcext:value-type="float">
            <text:p>8557.8</text:p>
          </table:table-cell>
          <table:table-cell table:formula="of:=[.A67]/1000" office:value-type="float" office:value="8.5578" calcext:value-type="float">
            <text:p>8.5578</text:p>
          </table:table-cell>
          <table:table-cell office:value-type="float" office:value="0.2" calcext:value-type="float">
            <text:p>0.2</text:p>
          </table:table-cell>
          <table:table-cell table:number-columns-repeated="2"/>
          <table:table-cell table:formula="of:=[.$C$4]+[.$D$4]*[.B67]" office:value-type="float" office:value="-53.061504" calcext:value-type="float">
            <text:p>-53.061504</text:p>
          </table:table-cell>
          <table:table-cell table:formula="of:=[.$C$5]-[.$D$5]*[.B67]" office:value-type="float" office:value="0.817284000000001" calcext:value-type="float">
            <text:p>0.817284000000001</text:p>
          </table:table-cell>
          <table:table-cell table:formula="of:=[.$C$6]-[.B67]" office:value-type="float" office:value="38.6422" calcext:value-type="float">
            <text:p>38.6422</text:p>
          </table:table-cell>
          <table:table-cell table:formula="of:=[.H67]/4" office:value-type="float" office:value="9.66055" calcext:value-type="float">
            <text:p>9.66055</text:p>
          </table:table-cell>
        </table:table-row>
        <table:table-row table:style-name="ro2">
          <table:table-cell office:value-type="float" office:value="8603" calcext:value-type="float">
            <text:p>8603</text:p>
          </table:table-cell>
          <table:table-cell table:formula="of:=[.A68]/1000" office:value-type="float" office:value="8.603" calcext:value-type="float">
            <text:p>8.60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C$4]+[.$D$4]*[.B68]" office:value-type="float" office:value="-53.04704" calcext:value-type="float">
            <text:p>-53.04704</text:p>
          </table:table-cell>
          <table:table-cell table:formula="of:=[.$C$5]-[.$D$5]*[.B68]" office:value-type="float" office:value="0.80734" calcext:value-type="float">
            <text:p>0.80734</text:p>
          </table:table-cell>
          <table:table-cell table:formula="of:=[.$C$6]-[.B68]" office:value-type="float" office:value="38.597" calcext:value-type="float">
            <text:p>38.597</text:p>
          </table:table-cell>
          <table:table-cell table:formula="of:=[.H68]/4" office:value-type="float" office:value="9.64925" calcext:value-type="float">
            <text:p>9.64925</text:p>
          </table:table-cell>
        </table:table-row>
        <table:table-row table:style-name="ro2">
          <table:table-cell office:value-type="float" office:value="8609" calcext:value-type="float">
            <text:p>8609</text:p>
          </table:table-cell>
          <table:table-cell table:formula="of:=[.A69]/1000" office:value-type="float" office:value="8.609" calcext:value-type="float">
            <text:p>8.60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C$4]+[.$D$4]*[.B69]" office:value-type="float" office:value="-53.04512" calcext:value-type="float">
            <text:p>-53.04512</text:p>
          </table:table-cell>
          <table:table-cell table:formula="of:=[.$C$5]-[.$D$5]*[.B69]" office:value-type="float" office:value="0.80602" calcext:value-type="float">
            <text:p>0.80602</text:p>
          </table:table-cell>
          <table:table-cell table:formula="of:=[.$C$6]-[.B69]" office:value-type="float" office:value="38.591" calcext:value-type="float">
            <text:p>38.591</text:p>
          </table:table-cell>
          <table:table-cell table:formula="of:=[.H69]/4" office:value-type="float" office:value="9.64775" calcext:value-type="float">
            <text:p>9.64775</text:p>
          </table:table-cell>
        </table:table-row>
        <table:table-row table:style-name="ro2">
          <table:table-cell office:value-type="float" office:value="8610" calcext:value-type="float">
            <text:p>8610</text:p>
          </table:table-cell>
          <table:table-cell table:formula="of:=[.A70]/1000" office:value-type="float" office:value="8.61" calcext:value-type="float">
            <text:p>8.6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C$4]+[.$D$4]*[.B70]" office:value-type="float" office:value="-53.0448" calcext:value-type="float">
            <text:p>-53.0448</text:p>
          </table:table-cell>
          <table:table-cell table:formula="of:=[.$C$5]-[.$D$5]*[.B70]" office:value-type="float" office:value="0.8058" calcext:value-type="float">
            <text:p>0.8058</text:p>
          </table:table-cell>
          <table:table-cell table:formula="of:=[.$C$6]-[.B70]" office:value-type="float" office:value="38.59" calcext:value-type="float">
            <text:p>38.59</text:p>
          </table:table-cell>
          <table:table-cell table:formula="of:=[.H70]/4" office:value-type="float" office:value="9.6475" calcext:value-type="float">
            <text:p>9.6475</text:p>
          </table:table-cell>
        </table:table-row>
        <table:table-row table:style-name="ro2">
          <table:table-cell office:value-type="float" office:value="8622" calcext:value-type="float">
            <text:p>8622</text:p>
          </table:table-cell>
          <table:table-cell table:formula="of:=[.A71]/1000" office:value-type="float" office:value="8.622" calcext:value-type="float">
            <text:p>8.62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C$4]+[.$D$4]*[.B71]" office:value-type="float" office:value="-53.04096" calcext:value-type="float">
            <text:p>-53.04096</text:p>
          </table:table-cell>
          <table:table-cell table:formula="of:=[.$C$5]-[.$D$5]*[.B71]" office:value-type="float" office:value="0.80316" calcext:value-type="float">
            <text:p>0.80316</text:p>
          </table:table-cell>
          <table:table-cell table:formula="of:=[.$C$6]-[.B71]" office:value-type="float" office:value="38.578" calcext:value-type="float">
            <text:p>38.578</text:p>
          </table:table-cell>
          <table:table-cell table:formula="of:=[.H71]/4" office:value-type="float" office:value="9.6445" calcext:value-type="float">
            <text:p>9.6445</text:p>
          </table:table-cell>
        </table:table-row>
        <table:table-row table:style-name="ro2">
          <table:table-cell office:value-type="float" office:value="8641" calcext:value-type="float">
            <text:p>8641</text:p>
          </table:table-cell>
          <table:table-cell table:formula="of:=[.A72]/1000" office:value-type="float" office:value="8.641" calcext:value-type="float">
            <text:p>8.64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C$4]+[.$D$4]*[.B72]" office:value-type="float" office:value="-53.03488" calcext:value-type="float">
            <text:p>-53.03488</text:p>
          </table:table-cell>
          <table:table-cell table:formula="of:=[.$C$5]-[.$D$5]*[.B72]" office:value-type="float" office:value="0.79898" calcext:value-type="float">
            <text:p>0.79898</text:p>
          </table:table-cell>
          <table:table-cell table:formula="of:=[.$C$6]-[.B72]" office:value-type="float" office:value="38.559" calcext:value-type="float">
            <text:p>38.559</text:p>
          </table:table-cell>
          <table:table-cell table:formula="of:=[.H72]/4" office:value-type="float" office:value="9.63975" calcext:value-type="float">
            <text:p>9.63975</text:p>
          </table:table-cell>
        </table:table-row>
        <table:table-row table:style-name="ro2">
          <table:table-cell office:value-type="float" office:value="8655" calcext:value-type="float">
            <text:p>8655</text:p>
          </table:table-cell>
          <table:table-cell table:formula="of:=[.A73]/1000" office:value-type="float" office:value="8.655" calcext:value-type="float">
            <text:p>8.655</text:p>
          </table:table-cell>
          <table:table-cell table:number-columns-repeated="3"/>
          <table:table-cell table:formula="of:=[.$C$4]+[.$D$4]*[.B73]" office:value-type="float" office:value="-53.0304" calcext:value-type="float">
            <text:p>-53.0304</text:p>
          </table:table-cell>
          <table:table-cell table:formula="of:=[.$C$5]-[.$D$5]*[.B73]" office:value-type="float" office:value="0.7959" calcext:value-type="float">
            <text:p>0.7959</text:p>
          </table:table-cell>
          <table:table-cell table:formula="of:=[.$C$6]-[.B73]" office:value-type="float" office:value="38.545" calcext:value-type="float">
            <text:p>38.545</text:p>
          </table:table-cell>
          <table:table-cell table:formula="of:=[.H73]/4" office:value-type="float" office:value="9.63625" calcext:value-type="float">
            <text:p>9.63625</text:p>
          </table:table-cell>
        </table:table-row>
        <table:table-row table:style-name="ro2">
          <table:table-cell office:value-type="float" office:value="8670" calcext:value-type="float">
            <text:p>8670</text:p>
          </table:table-cell>
          <table:table-cell table:formula="of:=[.A74]/1000" office:value-type="float" office:value="8.67" calcext:value-type="float">
            <text:p>8.6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C$4]+[.$D$4]*[.B74]" office:value-type="float" office:value="-53.0256" calcext:value-type="float">
            <text:p>-53.0256</text:p>
          </table:table-cell>
          <table:table-cell table:formula="of:=[.$C$5]-[.$D$5]*[.B74]" office:value-type="float" office:value="0.7926" calcext:value-type="float">
            <text:p>0.7926</text:p>
          </table:table-cell>
          <table:table-cell table:formula="of:=[.$C$6]-[.B74]" office:value-type="float" office:value="38.53" calcext:value-type="float">
            <text:p>38.53</text:p>
          </table:table-cell>
          <table:table-cell table:formula="of:=[.H74]/4" office:value-type="float" office:value="9.6325" calcext:value-type="float">
            <text:p>9.6325</text:p>
          </table:table-cell>
        </table:table-row>
        <table:table-row table:style-name="ro2">
          <table:table-cell office:value-type="float" office:value="8762" calcext:value-type="float">
            <text:p>8762</text:p>
          </table:table-cell>
          <table:table-cell table:formula="of:=[.A75]/1000" office:value-type="float" office:value="8.762" calcext:value-type="float">
            <text:p>8.76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C$4]+[.$D$4]*[.B75]" office:value-type="float" office:value="-52.99616" calcext:value-type="float">
            <text:p>-52.99616</text:p>
          </table:table-cell>
          <table:table-cell table:formula="of:=[.$C$5]-[.$D$5]*[.B75]" office:value-type="float" office:value="0.77236" calcext:value-type="float">
            <text:p>0.77236</text:p>
          </table:table-cell>
          <table:table-cell table:formula="of:=[.$C$6]-[.B75]" office:value-type="float" office:value="38.438" calcext:value-type="float">
            <text:p>38.438</text:p>
          </table:table-cell>
          <table:table-cell table:formula="of:=[.H75]/4" office:value-type="float" office:value="9.6095" calcext:value-type="float">
            <text:p>9.6095</text:p>
          </table:table-cell>
        </table:table-row>
        <table:table-row table:style-name="ro2">
          <table:table-cell office:value-type="float" office:value="8854" calcext:value-type="float">
            <text:p>8854</text:p>
          </table:table-cell>
          <table:table-cell table:formula="of:=[.A76]/1000" office:value-type="float" office:value="8.854" calcext:value-type="float">
            <text:p>8.85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C$4]+[.$D$4]*[.B76]" office:value-type="float" office:value="-52.96672" calcext:value-type="float">
            <text:p>-52.96672</text:p>
          </table:table-cell>
          <table:table-cell table:formula="of:=[.$C$5]-[.$D$5]*[.B76]" office:value-type="float" office:value="0.75212" calcext:value-type="float">
            <text:p>0.75212</text:p>
          </table:table-cell>
          <table:table-cell table:formula="of:=[.$C$6]-[.B76]" office:value-type="float" office:value="38.346" calcext:value-type="float">
            <text:p>38.346</text:p>
          </table:table-cell>
          <table:table-cell table:formula="of:=[.H76]/4" office:value-type="float" office:value="9.5865" calcext:value-type="float">
            <text:p>9.5865</text:p>
          </table:table-cell>
        </table:table-row>
        <table:table-row table:style-name="ro2">
          <table:table-cell office:value-type="float" office:value="8865" calcext:value-type="float">
            <text:p>8865</text:p>
          </table:table-cell>
          <table:table-cell table:formula="of:=[.A77]/1000" office:value-type="float" office:value="8.865" calcext:value-type="float">
            <text:p>8.86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C$4]+[.$D$4]*[.B77]" office:value-type="float" office:value="-52.9632" calcext:value-type="float">
            <text:p>-52.9632</text:p>
          </table:table-cell>
          <table:table-cell table:formula="of:=[.$C$5]-[.$D$5]*[.B77]" office:value-type="float" office:value="0.7497" calcext:value-type="float">
            <text:p>0.7497</text:p>
          </table:table-cell>
          <table:table-cell table:formula="of:=[.$C$6]-[.B77]" office:value-type="float" office:value="38.335" calcext:value-type="float">
            <text:p>38.335</text:p>
          </table:table-cell>
          <table:table-cell table:formula="of:=[.H77]/4" office:value-type="float" office:value="9.58375" calcext:value-type="float">
            <text:p>9.58375</text:p>
          </table:table-cell>
        </table:table-row>
        <table:table-row table:style-name="ro2">
          <table:table-cell office:value-type="float" office:value="8909" calcext:value-type="float">
            <text:p>8909</text:p>
          </table:table-cell>
          <table:table-cell table:formula="of:=[.A78]/1000" office:value-type="float" office:value="8.909" calcext:value-type="float">
            <text:p>8.90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C$4]+[.$D$4]*[.B78]" office:value-type="float" office:value="-52.94912" calcext:value-type="float">
            <text:p>-52.94912</text:p>
          </table:table-cell>
          <table:table-cell table:formula="of:=[.$C$5]-[.$D$5]*[.B78]" office:value-type="float" office:value="0.74002" calcext:value-type="float">
            <text:p>0.74002</text:p>
          </table:table-cell>
          <table:table-cell table:formula="of:=[.$C$6]-[.B78]" office:value-type="float" office:value="38.291" calcext:value-type="float">
            <text:p>38.291</text:p>
          </table:table-cell>
          <table:table-cell table:formula="of:=[.H78]/4" office:value-type="float" office:value="9.57275" calcext:value-type="float">
            <text:p>9.57275</text:p>
          </table:table-cell>
        </table:table-row>
        <table:table-row table:style-name="ro2">
          <table:table-cell office:value-type="float" office:value="8959" calcext:value-type="float">
            <text:p>8959</text:p>
          </table:table-cell>
          <table:table-cell table:formula="of:=[.A79]/1000" office:value-type="float" office:value="8.959" calcext:value-type="float">
            <text:p>8.95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C$4]+[.$D$4]*[.B79]" office:value-type="float" office:value="-52.93312" calcext:value-type="float">
            <text:p>-52.93312</text:p>
          </table:table-cell>
          <table:table-cell table:formula="of:=[.$C$5]-[.$D$5]*[.B79]" office:value-type="float" office:value="0.72902" calcext:value-type="float">
            <text:p>0.72902</text:p>
          </table:table-cell>
          <table:table-cell table:formula="of:=[.$C$6]-[.B79]" office:value-type="float" office:value="38.241" calcext:value-type="float">
            <text:p>38.241</text:p>
          </table:table-cell>
          <table:table-cell table:formula="of:=[.H79]/4" office:value-type="float" office:value="9.56025" calcext:value-type="float">
            <text:p>9.56025</text:p>
          </table:table-cell>
        </table:table-row>
        <table:table-row table:style-name="ro2">
          <table:table-cell office:value-type="float" office:value="9019" calcext:value-type="float">
            <text:p>9019</text:p>
          </table:table-cell>
          <table:table-cell table:formula="of:=[.A80]/1000" office:value-type="float" office:value="9.019" calcext:value-type="float">
            <text:p>9.019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table:formula="of:=[.$C$4]+[.$D$4]*[.B80]" office:value-type="float" office:value="-52.91392" calcext:value-type="float">
            <text:p>-52.91392</text:p>
          </table:table-cell>
          <table:table-cell table:formula="of:=[.$C$5]-[.$D$5]*[.B80]" office:value-type="float" office:value="0.71582" calcext:value-type="float">
            <text:p>0.71582</text:p>
          </table:table-cell>
          <table:table-cell table:formula="of:=[.$C$6]-[.B80]" office:value-type="float" office:value="38.181" calcext:value-type="float">
            <text:p>38.181</text:p>
          </table:table-cell>
          <table:table-cell table:formula="of:=[.H80]/4" office:value-type="float" office:value="9.54525" calcext:value-type="float">
            <text:p>9.54525</text:p>
          </table:table-cell>
        </table:table-row>
        <table:table-row table:style-name="ro2">
          <table:table-cell office:value-type="float" office:value="9151" calcext:value-type="float">
            <text:p>9151</text:p>
          </table:table-cell>
          <table:table-cell table:formula="of:=[.A81]/1000" office:value-type="float" office:value="9.151" calcext:value-type="float">
            <text:p>9.15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C$4]+[.$D$4]*[.B81]" office:value-type="float" office:value="-52.87168" calcext:value-type="float">
            <text:p>-52.87168</text:p>
          </table:table-cell>
          <table:table-cell table:formula="of:=[.$C$5]-[.$D$5]*[.B81]" office:value-type="float" office:value="0.68678" calcext:value-type="float">
            <text:p>0.68678</text:p>
          </table:table-cell>
          <table:table-cell table:formula="of:=[.$C$6]-[.B81]" office:value-type="float" office:value="38.049" calcext:value-type="float">
            <text:p>38.049</text:p>
          </table:table-cell>
          <table:table-cell table:formula="of:=[.H81]/4" office:value-type="float" office:value="9.51225" calcext:value-type="float">
            <text:p>9.51225</text:p>
          </table:table-cell>
        </table:table-row>
        <table:table-row table:style-name="ro2">
          <table:table-cell office:value-type="float" office:value="9157" calcext:value-type="float">
            <text:p>9157</text:p>
          </table:table-cell>
          <table:table-cell table:formula="of:=[.A82]/1000" office:value-type="float" office:value="9.157" calcext:value-type="float">
            <text:p>9.15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C$4]+[.$D$4]*[.B82]" office:value-type="float" office:value="-52.86976" calcext:value-type="float">
            <text:p>-52.86976</text:p>
          </table:table-cell>
          <table:table-cell table:formula="of:=[.$C$5]-[.$D$5]*[.B82]" office:value-type="float" office:value="0.68546" calcext:value-type="float">
            <text:p>0.68546</text:p>
          </table:table-cell>
          <table:table-cell table:formula="of:=[.$C$6]-[.B82]" office:value-type="float" office:value="38.043" calcext:value-type="float">
            <text:p>38.043</text:p>
          </table:table-cell>
          <table:table-cell table:formula="of:=[.H82]/4" office:value-type="float" office:value="9.51075" calcext:value-type="float">
            <text:p>9.51075</text:p>
          </table:table-cell>
        </table:table-row>
        <table:table-row table:style-name="ro2">
          <table:table-cell office:value-type="float" office:value="9219" calcext:value-type="float">
            <text:p>9219</text:p>
          </table:table-cell>
          <table:table-cell table:formula="of:=[.A83]/1000" office:value-type="float" office:value="9.219" calcext:value-type="float">
            <text:p>9.2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C$4]+[.$D$4]*[.B83]" office:value-type="float" office:value="-52.84992" calcext:value-type="float">
            <text:p>-52.84992</text:p>
          </table:table-cell>
          <table:table-cell table:formula="of:=[.$C$5]-[.$D$5]*[.B83]" office:value-type="float" office:value="0.67182" calcext:value-type="float">
            <text:p>0.67182</text:p>
          </table:table-cell>
          <table:table-cell table:formula="of:=[.$C$6]-[.B83]" office:value-type="float" office:value="37.981" calcext:value-type="float">
            <text:p>37.981</text:p>
          </table:table-cell>
          <table:table-cell table:formula="of:=[.H83]/4" office:value-type="float" office:value="9.49525" calcext:value-type="float">
            <text:p>9.49525</text:p>
          </table:table-cell>
        </table:table-row>
        <table:table-row table:style-name="ro2">
          <table:table-cell office:value-type="float" office:value="9252" calcext:value-type="float">
            <text:p>9252</text:p>
          </table:table-cell>
          <table:table-cell table:formula="of:=[.A84]/1000" office:value-type="float" office:value="9.252" calcext:value-type="float">
            <text:p>9.25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C$4]+[.$D$4]*[.B84]" office:value-type="float" office:value="-52.83936" calcext:value-type="float">
            <text:p>-52.83936</text:p>
          </table:table-cell>
          <table:table-cell table:formula="of:=[.$C$5]-[.$D$5]*[.B84]" office:value-type="float" office:value="0.66456" calcext:value-type="float">
            <text:p>0.66456</text:p>
          </table:table-cell>
          <table:table-cell table:formula="of:=[.$C$6]-[.B84]" office:value-type="float" office:value="37.948" calcext:value-type="float">
            <text:p>37.948</text:p>
          </table:table-cell>
          <table:table-cell table:formula="of:=[.H84]/4" office:value-type="float" office:value="9.487" calcext:value-type="float">
            <text:p>9.487</text:p>
          </table:table-cell>
        </table:table-row>
        <table:table-row table:style-name="ro2">
          <table:table-cell office:value-type="float" office:value="9298" calcext:value-type="float">
            <text:p>9298</text:p>
          </table:table-cell>
          <table:table-cell table:formula="of:=[.A85]/1000" office:value-type="float" office:value="9.298" calcext:value-type="float">
            <text:p>9.29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C$4]+[.$D$4]*[.B85]" office:value-type="float" office:value="-52.82464" calcext:value-type="float">
            <text:p>-52.82464</text:p>
          </table:table-cell>
          <table:table-cell table:formula="of:=[.$C$5]-[.$D$5]*[.B85]" office:value-type="float" office:value="0.65444" calcext:value-type="float">
            <text:p>0.65444</text:p>
          </table:table-cell>
          <table:table-cell table:formula="of:=[.$C$6]-[.B85]" office:value-type="float" office:value="37.902" calcext:value-type="float">
            <text:p>37.902</text:p>
          </table:table-cell>
          <table:table-cell table:formula="of:=[.H85]/4" office:value-type="float" office:value="9.4755" calcext:value-type="float">
            <text:p>9.4755</text:p>
          </table:table-cell>
        </table:table-row>
        <table:table-row table:style-name="ro2">
          <table:table-cell office:value-type="float" office:value="9326" calcext:value-type="float">
            <text:p>9326</text:p>
          </table:table-cell>
          <table:table-cell table:formula="of:=[.A86]/1000" office:value-type="float" office:value="9.326" calcext:value-type="float">
            <text:p>9.32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C$4]+[.$D$4]*[.B86]" office:value-type="float" office:value="-52.81568" calcext:value-type="float">
            <text:p>-52.81568</text:p>
          </table:table-cell>
          <table:table-cell table:formula="of:=[.$C$5]-[.$D$5]*[.B86]" office:value-type="float" office:value="0.64828" calcext:value-type="float">
            <text:p>0.64828</text:p>
          </table:table-cell>
          <table:table-cell table:formula="of:=[.$C$6]-[.B86]" office:value-type="float" office:value="37.874" calcext:value-type="float">
            <text:p>37.874</text:p>
          </table:table-cell>
          <table:table-cell table:formula="of:=[.H86]/4" office:value-type="float" office:value="9.4685" calcext:value-type="float">
            <text:p>9.4685</text:p>
          </table:table-cell>
        </table:table-row>
        <table:table-row table:style-name="ro2">
          <table:table-cell office:value-type="float" office:value="9392" calcext:value-type="float">
            <text:p>9392</text:p>
          </table:table-cell>
          <table:table-cell table:formula="of:=[.A87]/1000" office:value-type="float" office:value="9.392" calcext:value-type="float">
            <text:p>9.3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C$4]+[.$D$4]*[.B87]" office:value-type="float" office:value="-52.79456" calcext:value-type="float">
            <text:p>-52.79456</text:p>
          </table:table-cell>
          <table:table-cell table:formula="of:=[.$C$5]-[.$D$5]*[.B87]" office:value-type="float" office:value="0.63376" calcext:value-type="float">
            <text:p>0.63376</text:p>
          </table:table-cell>
          <table:table-cell table:formula="of:=[.$C$6]-[.B87]" office:value-type="float" office:value="37.808" calcext:value-type="float">
            <text:p>37.808</text:p>
          </table:table-cell>
          <table:table-cell table:formula="of:=[.H87]/4" office:value-type="float" office:value="9.452" calcext:value-type="float">
            <text:p>9.452</text:p>
          </table:table-cell>
        </table:table-row>
        <table:table-row table:style-name="ro2">
          <table:table-cell office:value-type="float" office:value="9413" calcext:value-type="float">
            <text:p>9413</text:p>
          </table:table-cell>
          <table:table-cell table:formula="of:=[.A88]/1000" office:value-type="float" office:value="9.413" calcext:value-type="float">
            <text:p>9.41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C$4]+[.$D$4]*[.B88]" office:value-type="float" office:value="-52.78784" calcext:value-type="float">
            <text:p>-52.78784</text:p>
          </table:table-cell>
          <table:table-cell table:formula="of:=[.$C$5]-[.$D$5]*[.B88]" office:value-type="float" office:value="0.62914" calcext:value-type="float">
            <text:p>0.62914</text:p>
          </table:table-cell>
          <table:table-cell table:formula="of:=[.$C$6]-[.B88]" office:value-type="float" office:value="37.787" calcext:value-type="float">
            <text:p>37.787</text:p>
          </table:table-cell>
          <table:table-cell table:formula="of:=[.H88]/4" office:value-type="float" office:value="9.44675" calcext:value-type="float">
            <text:p>9.44675</text:p>
          </table:table-cell>
        </table:table-row>
        <table:table-row table:style-name="ro2">
          <table:table-cell office:value-type="float" office:value="9518" calcext:value-type="float">
            <text:p>9518</text:p>
          </table:table-cell>
          <table:table-cell table:formula="of:=[.A89]/1000" office:value-type="float" office:value="9.518" calcext:value-type="float">
            <text:p>9.51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C$4]+[.$D$4]*[.B89]" office:value-type="float" office:value="-52.75424" calcext:value-type="float">
            <text:p>-52.75424</text:p>
          </table:table-cell>
          <table:table-cell table:formula="of:=[.$C$5]-[.$D$5]*[.B89]" office:value-type="float" office:value="0.60604" calcext:value-type="float">
            <text:p>0.60604</text:p>
          </table:table-cell>
          <table:table-cell table:formula="of:=[.$C$6]-[.B89]" office:value-type="float" office:value="37.682" calcext:value-type="float">
            <text:p>37.682</text:p>
          </table:table-cell>
          <table:table-cell table:formula="of:=[.H89]/4" office:value-type="float" office:value="9.4205" calcext:value-type="float">
            <text:p>9.4205</text:p>
          </table:table-cell>
        </table:table-row>
        <table:table-row table:style-name="ro2">
          <table:table-cell office:value-type="float" office:value="9630" calcext:value-type="float">
            <text:p>9630</text:p>
          </table:table-cell>
          <table:table-cell table:formula="of:=[.A90]/1000" office:value-type="float" office:value="9.63" calcext:value-type="float">
            <text:p>9.6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/2+</text:p>
          </table:table-cell>
          <table:table-cell/>
          <table:table-cell table:formula="of:=[.$C$4]+[.$D$4]*[.B90]" office:value-type="float" office:value="-52.7184" calcext:value-type="float">
            <text:p>-52.7184</text:p>
          </table:table-cell>
          <table:table-cell table:formula="of:=[.$C$5]-[.$D$5]*[.B90]" office:value-type="float" office:value="0.5814" calcext:value-type="float">
            <text:p>0.5814</text:p>
          </table:table-cell>
          <table:table-cell table:formula="of:=[.$C$6]-[.B90]" office:value-type="float" office:value="37.57" calcext:value-type="float">
            <text:p>37.57</text:p>
          </table:table-cell>
          <table:table-cell table:formula="of:=[.H90]/4" office:value-type="float" office:value="9.3925" calcext:value-type="float">
            <text:p>9.3925</text:p>
          </table:table-cell>
        </table:table-row>
        <table:table-row table:style-name="ro2">
          <table:table-cell office:value-type="float" office:value="9667" calcext:value-type="float">
            <text:p>9667</text:p>
          </table:table-cell>
          <table:table-cell table:formula="of:=[.A91]/1000" office:value-type="float" office:value="9.667" calcext:value-type="float">
            <text:p>9.66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C$4]+[.$D$4]*[.B91]" office:value-type="float" office:value="-52.70656" calcext:value-type="float">
            <text:p>-52.70656</text:p>
          </table:table-cell>
          <table:table-cell table:formula="of:=[.$C$5]-[.$D$5]*[.B91]" office:value-type="float" office:value="0.57326" calcext:value-type="float">
            <text:p>0.57326</text:p>
          </table:table-cell>
          <table:table-cell table:formula="of:=[.$C$6]-[.B91]" office:value-type="float" office:value="37.533" calcext:value-type="float">
            <text:p>37.533</text:p>
          </table:table-cell>
          <table:table-cell table:formula="of:=[.H91]/4" office:value-type="float" office:value="9.38325" calcext:value-type="float">
            <text:p>9.38325</text:p>
          </table:table-cell>
        </table:table-row>
        <table:table-row table:style-name="ro2">
          <table:table-cell office:value-type="float" office:value="9683" calcext:value-type="float">
            <text:p>9683</text:p>
          </table:table-cell>
          <table:table-cell table:formula="of:=[.A92]/1000" office:value-type="float" office:value="9.683" calcext:value-type="float">
            <text:p>9.68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C$4]+[.$D$4]*[.B92]" office:value-type="float" office:value="-52.70144" calcext:value-type="float">
            <text:p>-52.70144</text:p>
          </table:table-cell>
          <table:table-cell table:formula="of:=[.$C$5]-[.$D$5]*[.B92]" office:value-type="float" office:value="0.56974" calcext:value-type="float">
            <text:p>0.56974</text:p>
          </table:table-cell>
          <table:table-cell table:formula="of:=[.$C$6]-[.B92]" office:value-type="float" office:value="37.517" calcext:value-type="float">
            <text:p>37.517</text:p>
          </table:table-cell>
          <table:table-cell table:formula="of:=[.H92]/4" office:value-type="float" office:value="9.37925" calcext:value-type="float">
            <text:p>9.37925</text:p>
          </table:table-cell>
        </table:table-row>
        <table:table-row table:style-name="ro2">
          <table:table-cell office:value-type="float" office:value="9765" calcext:value-type="float">
            <text:p>9765</text:p>
          </table:table-cell>
          <table:table-cell table:formula="of:=[.A93]/1000" office:value-type="float" office:value="9.765" calcext:value-type="float">
            <text:p>9.76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C$4]+[.$D$4]*[.B93]" office:value-type="float" office:value="-52.6752" calcext:value-type="float">
            <text:p>-52.6752</text:p>
          </table:table-cell>
          <table:table-cell table:formula="of:=[.$C$5]-[.$D$5]*[.B93]" office:value-type="float" office:value="0.5517" calcext:value-type="float">
            <text:p>0.5517</text:p>
          </table:table-cell>
          <table:table-cell table:formula="of:=[.$C$6]-[.B93]" office:value-type="float" office:value="37.435" calcext:value-type="float">
            <text:p>37.435</text:p>
          </table:table-cell>
          <table:table-cell table:formula="of:=[.H93]/4" office:value-type="float" office:value="9.35875" calcext:value-type="float">
            <text:p>9.35875</text:p>
          </table:table-cell>
        </table:table-row>
        <table:table-row table:style-name="ro2">
          <table:table-cell office:value-type="float" office:value="9779" calcext:value-type="float">
            <text:p>9779</text:p>
          </table:table-cell>
          <table:table-cell table:formula="of:=[.A94]/1000" office:value-type="float" office:value="9.779" calcext:value-type="float">
            <text:p>9.77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C$4]+[.$D$4]*[.B94]" office:value-type="float" office:value="-52.67072" calcext:value-type="float">
            <text:p>-52.67072</text:p>
          </table:table-cell>
          <table:table-cell table:formula="of:=[.$C$5]-[.$D$5]*[.B94]" office:value-type="float" office:value="0.54862" calcext:value-type="float">
            <text:p>0.54862</text:p>
          </table:table-cell>
          <table:table-cell table:formula="of:=[.$C$6]-[.B94]" office:value-type="float" office:value="37.421" calcext:value-type="float">
            <text:p>37.421</text:p>
          </table:table-cell>
          <table:table-cell table:formula="of:=[.H94]/4" office:value-type="float" office:value="9.35525" calcext:value-type="float">
            <text:p>9.35525</text:p>
          </table:table-cell>
        </table:table-row>
        <table:table-row table:style-name="ro2">
          <table:table-cell office:value-type="float" office:value="9850" calcext:value-type="float">
            <text:p>9850</text:p>
          </table:table-cell>
          <table:table-cell table:formula="of:=[.A95]/1000" office:value-type="float" office:value="9.85" calcext:value-type="float">
            <text:p>9.8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C$4]+[.$D$4]*[.B95]" office:value-type="float" office:value="-52.648" calcext:value-type="float">
            <text:p>-52.648</text:p>
          </table:table-cell>
          <table:table-cell table:formula="of:=[.$C$5]-[.$D$5]*[.B95]" office:value-type="float" office:value="0.533" calcext:value-type="float">
            <text:p>0.533</text:p>
          </table:table-cell>
          <table:table-cell table:formula="of:=[.$C$6]-[.B95]" office:value-type="float" office:value="37.35" calcext:value-type="float">
            <text:p>37.35</text:p>
          </table:table-cell>
          <table:table-cell table:formula="of:=[.H95]/4" office:value-type="float" office:value="9.3375" calcext:value-type="float">
            <text:p>9.3375</text:p>
          </table:table-cell>
        </table:table-row>
        <table:table-row table:style-name="ro2">
          <table:table-cell office:value-type="float" office:value="9943" calcext:value-type="float">
            <text:p>9943</text:p>
          </table:table-cell>
          <table:table-cell table:formula="of:=[.A96]/1000" office:value-type="float" office:value="9.943" calcext:value-type="float">
            <text:p>9.94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C$4]+[.$D$4]*[.B96]" office:value-type="float" office:value="-52.61824" calcext:value-type="float">
            <text:p>-52.61824</text:p>
          </table:table-cell>
          <table:table-cell table:formula="of:=[.$C$5]-[.$D$5]*[.B96]" office:value-type="float" office:value="0.51254" calcext:value-type="float">
            <text:p>0.51254</text:p>
          </table:table-cell>
          <table:table-cell table:formula="of:=[.$C$6]-[.B96]" office:value-type="float" office:value="37.257" calcext:value-type="float">
            <text:p>37.257</text:p>
          </table:table-cell>
          <table:table-cell table:formula="of:=[.H96]/4" office:value-type="float" office:value="9.31425" calcext:value-type="float">
            <text:p>9.31425</text:p>
          </table:table-cell>
        </table:table-row>
        <table:table-row table:style-name="ro2">
          <table:table-cell office:value-type="float" office:value="9952" calcext:value-type="float">
            <text:p>9952</text:p>
          </table:table-cell>
          <table:table-cell table:formula="of:=[.A97]/1000" office:value-type="float" office:value="9.952" calcext:value-type="float">
            <text:p>9.95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C$4]+[.$D$4]*[.B97]" office:value-type="float" office:value="-52.61536" calcext:value-type="float">
            <text:p>-52.61536</text:p>
          </table:table-cell>
          <table:table-cell table:formula="of:=[.$C$5]-[.$D$5]*[.B97]" office:value-type="float" office:value="0.51056" calcext:value-type="float">
            <text:p>0.51056</text:p>
          </table:table-cell>
          <table:table-cell table:formula="of:=[.$C$6]-[.B97]" office:value-type="float" office:value="37.248" calcext:value-type="float">
            <text:p>37.248</text:p>
          </table:table-cell>
          <table:table-cell table:formula="of:=[.H97]/4" office:value-type="float" office:value="9.312" calcext:value-type="float">
            <text:p>9.312</text:p>
          </table:table-cell>
        </table:table-row>
        <table:table-row table:style-name="ro2">
          <table:table-cell office:value-type="float" office:value="9987" calcext:value-type="float">
            <text:p>9987</text:p>
          </table:table-cell>
          <table:table-cell table:formula="of:=[.A98]/1000" office:value-type="float" office:value="9.987" calcext:value-type="float">
            <text:p>9.98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C$4]+[.$D$4]*[.B98]" office:value-type="float" office:value="-52.60416" calcext:value-type="float">
            <text:p>-52.60416</text:p>
          </table:table-cell>
          <table:table-cell table:formula="of:=[.$C$5]-[.$D$5]*[.B98]" office:value-type="float" office:value="0.50286" calcext:value-type="float">
            <text:p>0.50286</text:p>
          </table:table-cell>
          <table:table-cell table:formula="of:=[.$C$6]-[.B98]" office:value-type="float" office:value="37.213" calcext:value-type="float">
            <text:p>37.213</text:p>
          </table:table-cell>
          <table:table-cell table:formula="of:=[.H98]/4" office:value-type="float" office:value="9.30325" calcext:value-type="float">
            <text:p>9.30325</text:p>
          </table:table-cell>
        </table:table-row>
        <table:table-row table:style-name="ro2">
          <table:table-cell office:value-type="float" office:value="10006" calcext:value-type="float">
            <text:p>10006</text:p>
          </table:table-cell>
          <table:table-cell table:formula="of:=[.A99]/1000" office:value-type="float" office:value="10.006" calcext:value-type="float">
            <text:p>10.00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C$4]+[.$D$4]*[.B99]" office:value-type="float" office:value="-52.59808" calcext:value-type="float">
            <text:p>-52.59808</text:p>
          </table:table-cell>
          <table:table-cell table:formula="of:=[.$C$5]-[.$D$5]*[.B99]" office:value-type="float" office:value="0.49868" calcext:value-type="float">
            <text:p>0.49868</text:p>
          </table:table-cell>
          <table:table-cell table:formula="of:=[.$C$6]-[.B99]" office:value-type="float" office:value="37.194" calcext:value-type="float">
            <text:p>37.194</text:p>
          </table:table-cell>
          <table:table-cell table:formula="of:=[.H99]/4" office:value-type="float" office:value="9.2985" calcext:value-type="float">
            <text:p>9.2985</text:p>
          </table:table-cell>
        </table:table-row>
        <table:table-row table:style-name="ro2">
          <table:table-cell office:value-type="float" office:value="10083" calcext:value-type="float">
            <text:p>10083</text:p>
          </table:table-cell>
          <table:table-cell table:formula="of:=[.A100]/1000" office:value-type="float" office:value="10.083" calcext:value-type="float">
            <text:p>10.08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C$4]+[.$D$4]*[.B100]" office:value-type="float" office:value="-52.57344" calcext:value-type="float">
            <text:p>-52.57344</text:p>
          </table:table-cell>
          <table:table-cell table:formula="of:=[.$C$5]-[.$D$5]*[.B100]" office:value-type="float" office:value="0.48174" calcext:value-type="float">
            <text:p>0.48174</text:p>
          </table:table-cell>
          <table:table-cell table:formula="of:=[.$C$6]-[.B100]" office:value-type="float" office:value="37.117" calcext:value-type="float">
            <text:p>37.117</text:p>
          </table:table-cell>
          <table:table-cell table:formula="of:=[.H100]/4" office:value-type="float" office:value="9.27925" calcext:value-type="float">
            <text:p>9.27925</text:p>
          </table:table-cell>
        </table:table-row>
        <table:table-row table:style-name="ro2">
          <table:table-cell office:value-type="float" office:value="10131" calcext:value-type="float">
            <text:p>10131</text:p>
          </table:table-cell>
          <table:table-cell table:formula="of:=[.A101]/1000" office:value-type="float" office:value="10.131" calcext:value-type="float">
            <text:p>10.13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C$4]+[.$D$4]*[.B101]" office:value-type="float" office:value="-52.55808" calcext:value-type="float">
            <text:p>-52.55808</text:p>
          </table:table-cell>
          <table:table-cell table:formula="of:=[.$C$5]-[.$D$5]*[.B101]" office:value-type="float" office:value="0.47118" calcext:value-type="float">
            <text:p>0.47118</text:p>
          </table:table-cell>
          <table:table-cell table:formula="of:=[.$C$6]-[.B101]" office:value-type="float" office:value="37.069" calcext:value-type="float">
            <text:p>37.069</text:p>
          </table:table-cell>
          <table:table-cell table:formula="of:=[.H101]/4" office:value-type="float" office:value="9.26725" calcext:value-type="float">
            <text:p>9.26725</text:p>
          </table:table-cell>
        </table:table-row>
        <table:table-row table:style-name="ro2">
          <table:table-cell office:value-type="float" office:value="10170" calcext:value-type="float">
            <text:p>10170</text:p>
          </table:table-cell>
          <table:table-cell table:formula="of:=[.A102]/1000" office:value-type="float" office:value="10.17" calcext:value-type="float">
            <text:p>10.1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C$4]+[.$D$4]*[.B102]" office:value-type="float" office:value="-52.5456" calcext:value-type="float">
            <text:p>-52.5456</text:p>
          </table:table-cell>
          <table:table-cell table:formula="of:=[.$C$5]-[.$D$5]*[.B102]" office:value-type="float" office:value="0.4626" calcext:value-type="float">
            <text:p>0.4626</text:p>
          </table:table-cell>
          <table:table-cell table:formula="of:=[.$C$6]-[.B102]" office:value-type="float" office:value="37.03" calcext:value-type="float">
            <text:p>37.03</text:p>
          </table:table-cell>
          <table:table-cell table:formula="of:=[.H102]/4" office:value-type="float" office:value="9.2575" calcext:value-type="float">
            <text:p>9.2575</text:p>
          </table:table-cell>
        </table:table-row>
        <table:table-row table:style-name="ro2">
          <table:table-cell office:value-type="float" office:value="10213" calcext:value-type="float">
            <text:p>10213</text:p>
          </table:table-cell>
          <table:table-cell table:formula="of:=[.A103]/1000" office:value-type="float" office:value="10.213" calcext:value-type="float">
            <text:p>10.213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$C$4]+[.$D$4]*[.B103]" office:value-type="float" office:value="-52.53184" calcext:value-type="float">
            <text:p>-52.53184</text:p>
          </table:table-cell>
          <table:table-cell table:formula="of:=[.$C$5]-[.$D$5]*[.B103]" office:value-type="float" office:value="0.45314" calcext:value-type="float">
            <text:p>0.45314</text:p>
          </table:table-cell>
          <table:table-cell table:formula="of:=[.$C$6]-[.B103]" office:value-type="float" office:value="36.987" calcext:value-type="float">
            <text:p>36.987</text:p>
          </table:table-cell>
          <table:table-cell table:formula="of:=[.H103]/4" office:value-type="float" office:value="9.24675" calcext:value-type="float">
            <text:p>9.24675</text:p>
          </table:table-cell>
        </table:table-row>
        <table:table-row table:style-name="ro2">
          <table:table-cell office:value-type="float" office:value="10236" calcext:value-type="float">
            <text:p>10236</text:p>
          </table:table-cell>
          <table:table-cell table:formula="of:=[.A104]/1000" office:value-type="float" office:value="10.236" calcext:value-type="float">
            <text:p>10.23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C$4]+[.$D$4]*[.B104]" office:value-type="float" office:value="-52.52448" calcext:value-type="float">
            <text:p>-52.52448</text:p>
          </table:table-cell>
          <table:table-cell table:formula="of:=[.$C$5]-[.$D$5]*[.B104]" office:value-type="float" office:value="0.44808" calcext:value-type="float">
            <text:p>0.44808</text:p>
          </table:table-cell>
          <table:table-cell table:formula="of:=[.$C$6]-[.B104]" office:value-type="float" office:value="36.964" calcext:value-type="float">
            <text:p>36.964</text:p>
          </table:table-cell>
          <table:table-cell table:formula="of:=[.H104]/4" office:value-type="float" office:value="9.241" calcext:value-type="float">
            <text:p>9.241</text:p>
          </table:table-cell>
        </table:table-row>
        <table:table-row table:style-name="ro2">
          <table:table-cell office:value-type="float" office:value="10252" calcext:value-type="float">
            <text:p>10252</text:p>
          </table:table-cell>
          <table:table-cell table:formula="of:=[.A105]/1000" office:value-type="float" office:value="10.252" calcext:value-type="float">
            <text:p>10.25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C$4]+[.$D$4]*[.B105]" office:value-type="float" office:value="-52.51936" calcext:value-type="float">
            <text:p>-52.51936</text:p>
          </table:table-cell>
          <table:table-cell table:formula="of:=[.$C$5]-[.$D$5]*[.B105]" office:value-type="float" office:value="0.44456" calcext:value-type="float">
            <text:p>0.44456</text:p>
          </table:table-cell>
          <table:table-cell table:formula="of:=[.$C$6]-[.B105]" office:value-type="float" office:value="36.948" calcext:value-type="float">
            <text:p>36.948</text:p>
          </table:table-cell>
          <table:table-cell table:formula="of:=[.H105]/4" office:value-type="float" office:value="9.237" calcext:value-type="float">
            <text:p>9.237</text:p>
          </table:table-cell>
        </table:table-row>
        <table:table-row table:style-name="ro2">
          <table:table-cell office:value-type="float" office:value="11087" calcext:value-type="float">
            <text:p>11087</text:p>
          </table:table-cell>
          <table:table-cell table:formula="of:=[.A106]/1000" office:value-type="float" office:value="11.087" calcext:value-type="float">
            <text:p>11.08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3/2+ 5/2+)</text:p>
          </table:table-cell>
          <table:table-cell/>
          <table:table-cell table:formula="of:=[.$C$4]+[.$D$4]*[.B106]" office:value-type="float" office:value="-52.25216" calcext:value-type="float">
            <text:p>-52.25216</text:p>
          </table:table-cell>
          <table:table-cell table:formula="of:=[.$C$5]-[.$D$5]*[.B106]" office:value-type="float" office:value="0.26086" calcext:value-type="float">
            <text:p>0.26086</text:p>
          </table:table-cell>
          <table:table-cell table:formula="of:=[.$C$6]-[.B106]" office:value-type="float" office:value="36.113" calcext:value-type="float">
            <text:p>36.113</text:p>
          </table:table-cell>
          <table:table-cell table:formula="of:=[.H106]/4" office:value-type="float" office:value="9.02825" calcext:value-type="float">
            <text:p>9.02825</text:p>
          </table:table-cell>
        </table:table-row>
        <table:table-row table:style-name="ro2">
          <table:table-cell office:value-type="float" office:value="11305" calcext:value-type="float">
            <text:p>11305</text:p>
          </table:table-cell>
          <table:table-cell table:formula="of:=[.A107]/1000" office:value-type="float" office:value="11.305" calcext:value-type="float">
            <text:p>11.30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3/2+ 5/2+)</text:p>
          </table:table-cell>
          <table:table-cell/>
          <table:table-cell table:formula="of:=[.$C$4]+[.$D$4]*[.B107]" office:value-type="float" office:value="-52.1824" calcext:value-type="float">
            <text:p>-52.1824</text:p>
          </table:table-cell>
          <table:table-cell table:formula="of:=[.$C$5]-[.$D$5]*[.B107]" office:value-type="float" office:value="0.2129" calcext:value-type="float">
            <text:p>0.2129</text:p>
          </table:table-cell>
          <table:table-cell table:formula="of:=[.$C$6]-[.B107]" office:value-type="float" office:value="35.895" calcext:value-type="float">
            <text:p>35.895</text:p>
          </table:table-cell>
          <table:table-cell table:formula="of:=[.H107]/4" office:value-type="float" office:value="8.97375" calcext:value-type="float">
            <text:p>8.97375</text:p>
          </table:table-cell>
        </table:table-row>
        <table:table-row table:style-name="ro2">
          <table:table-cell office:value-type="float" office:value="11665" calcext:value-type="float">
            <text:p>11665</text:p>
          </table:table-cell>
          <table:table-cell table:formula="of:=[.A108]/1000" office:value-type="float" office:value="11.665" calcext:value-type="float">
            <text:p>11.66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/2+</text:p>
          </table:table-cell>
          <table:table-cell/>
          <table:table-cell table:formula="of:=[.$C$4]+[.$D$4]*[.B108]" office:value-type="float" office:value="-52.0672" calcext:value-type="float">
            <text:p>-52.0672</text:p>
          </table:table-cell>
          <table:table-cell table:formula="of:=[.$C$5]-[.$D$5]*[.B108]" office:value-type="float" office:value="0.1337" calcext:value-type="float">
            <text:p>0.1337</text:p>
          </table:table-cell>
          <table:table-cell table:formula="of:=[.$C$6]-[.B108]" office:value-type="float" office:value="35.535" calcext:value-type="float">
            <text:p>35.535</text:p>
          </table:table-cell>
          <table:table-cell table:formula="of:=[.H108]/4" office:value-type="float" office:value="8.88375" calcext:value-type="float">
            <text:p>8.883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7">00/00/0000</text:date>, <text:time style:data-style-name="N2" text:time-value="17:16:15.25561381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1T19:58:16.551141367</meta:creation-date>
    <dc:date>2026-04-17T17:48:26.199314578</dc:date>
    <meta:editing-duration>P1DT13H25M21S</meta:editing-duration>
    <meta:editing-cycles>4</meta:editing-cycles>
    <meta:generator>LibreOffice/24.2.7.2$Linux_X86_64 LibreOffice_project/420$Build-2</meta:generator>
    <meta:document-statistic meta:table-count="1" meta:cell-count="760" meta:object-count="0"/>
  </office:meta>
</office:document-meta>
</file>